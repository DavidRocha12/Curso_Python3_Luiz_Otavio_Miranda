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d18c" officeooo:paragraph-rsid="001fd18c"/>
    </style:style>
    <style:style style:name="P2" style:family="paragraph" style:parent-style-name="Standard">
      <style:text-properties fo:font-weight="bold" officeooo:rsid="0021ce5c" officeooo:paragraph-rsid="0021ce5c" style:font-weight-asian="bold" style:font-weight-complex="bold"/>
    </style:style>
    <style:style style:name="P3" style:family="paragraph" style:parent-style-name="Standard">
      <style:text-properties officeooo:rsid="00268687" officeooo:paragraph-rsid="00268687"/>
    </style:style>
    <style:style style:name="P4" style:family="paragraph" style:parent-style-name="Standard">
      <style:text-properties officeooo:rsid="0021ce5c" officeooo:paragraph-rsid="0021ce5c"/>
    </style:style>
    <style:style style:name="P5" style:family="paragraph" style:parent-style-name="Standard">
      <style:text-properties officeooo:rsid="00244454" officeooo:paragraph-rsid="00244454"/>
    </style:style>
    <style:style style:name="P6" style:family="paragraph" style:parent-style-name="Standard">
      <style:text-properties officeooo:rsid="002bcf9f" officeooo:paragraph-rsid="002bcf9f"/>
    </style:style>
    <style:style style:name="P7" style:family="paragraph" style:parent-style-name="Standard">
      <style:text-properties officeooo:rsid="00268687" officeooo:paragraph-rsid="002b1bd2"/>
    </style:style>
    <style:style style:name="P8" style:family="paragraph" style:parent-style-name="Text_20_body">
      <style:text-properties officeooo:rsid="00268687" officeooo:paragraph-rsid="00268687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Liberation Serif" fo:font-size="12pt" style:text-underline-style="none" fo:font-weight="bold" style:text-blinking="false" style:font-size-asian="12pt" style:font-size-complex="12pt" loext:padding="0cm" loext:border="non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Liberation Serif" fo:font-size="12pt" style:text-underline-style="none" fo:font-weight="normal" officeooo:paragraph-rsid="002b1bd2" style:text-blinking="false" style:font-size-asian="12pt" style:font-size-complex="12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b1bd2"/>
    </style:style>
    <style:style style:name="P13" style:family="paragraph" style:parent-style-name="Standard">
      <style:text-properties officeooo:rsid="00271655" officeooo:paragraph-rsid="00271655"/>
    </style:style>
    <style:style style:name="P14" style:family="paragraph" style:parent-style-name="Standard">
      <style:text-properties officeooo:rsid="0027ff6d" officeooo:paragraph-rsid="0027ff6d"/>
    </style:style>
    <style:style style:name="P15" style:family="paragraph" style:parent-style-name="Standard">
      <style:text-properties officeooo:rsid="002524c3" officeooo:paragraph-rsid="002524c3"/>
    </style:style>
    <style:style style:name="P16" style:family="paragraph" style:parent-style-name="Standard">
      <style:text-properties officeooo:rsid="002eacc8" officeooo:paragraph-rsid="002eacc8"/>
    </style:style>
    <style:style style:name="P17" style:family="paragraph" style:parent-style-name="Standard">
      <style:text-properties fo:font-weight="bold" officeooo:rsid="002f5281" officeooo:paragraph-rsid="002f5281" style:font-weight-asian="bold" style:font-weight-complex="bold"/>
    </style:style>
    <style:style style:name="P18" style:family="paragraph" style:parent-style-name="Standard">
      <style:text-properties officeooo:rsid="002f5281" officeooo:paragraph-rsid="002f5281"/>
    </style:style>
    <style:style style:name="P19" style:family="paragraph" style:parent-style-name="Standard">
      <style:text-properties fo:font-weight="bold" officeooo:rsid="0031d141" officeooo:paragraph-rsid="0031d141" style:font-weight-asian="bold" style:font-weight-complex="bold"/>
    </style:style>
    <style:style style:name="P20" style:family="paragraph" style:parent-style-name="Standard">
      <style:text-properties fo:font-weight="bold" officeooo:rsid="00341194" officeooo:paragraph-rsid="00341194" style:font-weight-asian="bold" style:font-weight-complex="bold"/>
    </style:style>
    <style:style style:name="P21" style:family="paragraph" style:parent-style-name="Standard">
      <style:text-properties officeooo:rsid="00341194" officeooo:paragraph-rsid="00341194"/>
    </style:style>
    <style:style style:name="P22" style:family="paragraph" style:parent-style-name="Standard">
      <style:text-properties officeooo:rsid="00346522" officeooo:paragraph-rsid="00346522"/>
    </style:style>
    <style:style style:name="P23" style:family="paragraph" style:parent-style-name="Standard">
      <style:text-properties fo:color="#000000" loext:opacity="100%" officeooo:rsid="00341194" officeooo:paragraph-rsid="00341194" fo:background-color="#ffffff"/>
    </style:style>
    <style:style style:name="P24" style:family="paragraph" style:parent-style-name="Standard">
      <style:text-properties fo:color="#000000" loext:opacity="100%" style:font-name="Droid Sans Mono" fo:font-size="10.5pt" fo:font-weight="normal" officeooo:rsid="00341194" officeooo:paragraph-rsid="00341194" fo:background-color="#ffffff"/>
    </style:style>
    <style:style style:name="P25" style:family="paragraph" style:parent-style-name="Standard">
      <style:text-properties fo:font-weight="bold" officeooo:rsid="00362611" officeooo:paragraph-rsid="00362611" style:font-weight-asian="bold" style:font-weight-complex="bold"/>
    </style:style>
    <style:style style:name="P26" style:family="paragraph" style:parent-style-name="Standard">
      <style:text-properties officeooo:rsid="00362611" officeooo:paragraph-rsid="00362611"/>
    </style:style>
    <style:style style:name="P27" style:family="paragraph" style:parent-style-name="Standard">
      <style:text-properties officeooo:rsid="0037f7d4" officeooo:paragraph-rsid="0037f7d4"/>
    </style:style>
    <style:style style:name="P28" style:family="paragraph" style:parent-style-name="Standard">
      <style:text-properties officeooo:rsid="00399b20" officeooo:paragraph-rsid="00399b20"/>
    </style:style>
    <style:style style:name="P29" style:family="paragraph" style:parent-style-name="Standard">
      <style:text-properties fo:font-weight="bold" officeooo:rsid="003c113f" officeooo:paragraph-rsid="003c113f" style:font-weight-asian="bold" style:font-weight-complex="bold"/>
    </style:style>
    <style:style style:name="P30" style:family="paragraph" style:parent-style-name="Standard">
      <style:text-properties officeooo:rsid="003c113f" officeooo:paragraph-rsid="003c113f"/>
    </style:style>
    <style:style style:name="P31" style:family="paragraph" style:parent-style-name="Standard">
      <style:text-properties officeooo:rsid="00399b20" officeooo:paragraph-rsid="003c113f"/>
    </style:style>
    <style:style style:name="P32" style:family="paragraph" style:parent-style-name="Standard">
      <style:text-properties officeooo:rsid="003c8e24" officeooo:paragraph-rsid="003c8e24"/>
    </style:style>
    <style:style style:name="P33" style:family="paragraph" style:parent-style-name="Standard">
      <style:text-properties fo:font-weight="bold" officeooo:rsid="003e4ea0" officeooo:paragraph-rsid="003e4ea0" style:font-weight-asian="bold" style:font-weight-complex="bold"/>
    </style:style>
    <style:style style:name="P34" style:family="paragraph" style:parent-style-name="Standard">
      <style:text-properties officeooo:rsid="003e4ea0" officeooo:paragraph-rsid="003e4ea0"/>
    </style:style>
    <style:style style:name="P35" style:family="paragraph" style:parent-style-name="Standard">
      <style:text-properties officeooo:rsid="003fb1b1" officeooo:paragraph-rsid="003fb1b1"/>
    </style:style>
    <style:style style:name="P36" style:family="paragraph" style:parent-style-name="Standard">
      <style:text-properties fo:font-weight="bold" officeooo:rsid="00401dc5" officeooo:paragraph-rsid="00401dc5" style:font-weight-asian="bold" style:font-weight-complex="bold"/>
    </style:style>
    <style:style style:name="P37" style:family="paragraph" style:parent-style-name="Standard">
      <style:text-properties officeooo:rsid="00401dc5" officeooo:paragraph-rsid="00401dc5"/>
    </style:style>
    <style:style style:name="P38" style:family="paragraph" style:parent-style-name="Standard">
      <style:text-properties officeooo:rsid="00407851" officeooo:paragraph-rsid="00407851"/>
    </style:style>
    <style:style style:name="P39" style:family="paragraph" style:parent-style-name="Standard">
      <style:text-properties style:font-name="Arial" fo:font-size="12pt" officeooo:rsid="0041fe32" officeooo:paragraph-rsid="0041fe32" style:font-size-asian="12pt" style:font-size-complex="12pt"/>
    </style:style>
    <style:style style:name="P40" style:family="paragraph" style:parent-style-name="Standard">
      <style:text-properties fo:color="#000000" loext:opacity="100%" style:font-name="Arial" fo:font-size="12pt" officeooo:rsid="0041fe32" officeooo:paragraph-rsid="0041fe32" fo:background-color="#ffffff" style:font-size-asian="12pt" style:font-size-complex="12pt"/>
    </style:style>
    <style:style style:name="P41" style:family="paragraph" style:parent-style-name="Standard">
      <style:text-properties fo:color="#000000" loext:opacity="100%" style:font-name="Arial" fo:font-size="12pt" fo:font-weight="normal" officeooo:rsid="0041fe32" officeooo:paragraph-rsid="0041fe32" fo:background-color="#ffffff" style:font-size-asian="12pt" style:font-size-complex="12pt"/>
    </style:style>
    <style:style style:name="P42" style:family="paragraph" style:parent-style-name="Standard">
      <style:paragraph-properties style:line-height-at-least="0.503cm"/>
      <style:text-properties fo:color="#000000" loext:opacity="100%" style:font-name="Arial" fo:font-size="12pt" fo:font-weight="normal" fo:background-color="#ffffff" style:font-size-asian="12pt" style:font-size-complex="12pt"/>
    </style:style>
    <style:style style:name="P43" style:family="paragraph" style:parent-style-name="Standard">
      <style:paragraph-properties style:line-height-at-least="0.503cm"/>
      <style:text-properties fo:color="#000000" loext:opacity="100%" style:font-name="Arial" fo:font-size="12pt" fo:background-color="#ffffff" style:font-size-asian="12pt" style:font-size-complex="12pt"/>
    </style:style>
    <style:style style:name="P44" style:family="paragraph" style:parent-style-name="Standard">
      <style:paragraph-properties style:line-height-at-least="0.503cm"/>
      <style:text-properties fo:color="#000000" loext:opacity="100%" style:font-name="Arial" fo:font-size="12pt" fo:font-weight="normal" officeooo:rsid="004288de" officeooo:paragraph-rsid="004288de" fo:background-color="#ffffff" style:font-size-asian="12pt" style:font-size-complex="12pt"/>
    </style:style>
    <style:style style:name="P45" style:family="paragraph" style:parent-style-name="Standard">
      <style:text-properties fo:color="#000000" loext:opacity="100%" style:font-name="Arial" fo:font-size="12pt" officeooo:rsid="0044ae83" officeooo:paragraph-rsid="0044ae83" fo:background-color="#ffffff" style:font-size-asian="12pt" style:font-size-complex="12pt"/>
    </style:style>
    <style:style style:name="P46" style:family="paragraph" style:parent-style-name="Standard">
      <style:text-properties fo:color="#000000" loext:opacity="100%" style:font-name="Arial" fo:font-size="12pt" fo:font-weight="normal" officeooo:rsid="0044ae83" officeooo:paragraph-rsid="0044ae83" fo:background-color="#ffffff" style:font-size-asian="12pt" style:font-size-complex="12pt"/>
    </style:style>
    <style:style style:name="P4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fo:background-color="#ffffff" style:font-size-asian="12pt" style:font-size-complex="12pt"/>
    </style:style>
    <style:style style:name="P48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" fo:font-size="12pt" officeooo:rsid="0044ae83" fo:background-color="#ffffff" style:font-size-asian="12pt" style:font-size-complex="12pt"/>
    </style:style>
    <style:style style:name="P49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" fo:font-size="12pt" fo:font-weight="bold" officeooo:rsid="0044ae83" fo:background-color="#ffffff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fo:background-color="#ffffff" style:font-size-asian="12pt" style:font-weight-asian="bold" style:font-size-complex="12pt" style:font-weight-complex="bold"/>
    </style:style>
    <style:style style:name="P51" style:family="paragraph" style:parent-style-name="Standard">
      <style:paragraph-properties style:line-height-at-least="0.503cm"/>
      <style:text-properties fo:color="#000000" loext:opacity="100%" style:font-name="Arial" fo:font-size="12pt" fo:font-weight="bold" fo:background-color="#ffffff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44ae83" fo:background-color="#ffffff" style:font-size-asian="12pt" style:font-size-complex="12pt"/>
    </style:style>
    <style:style style:name="P5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officeooo:rsid="004f4fd6" officeooo:paragraph-rsid="004f4fd6" fo:background-color="#ffffff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4f4fd6" officeooo:paragraph-rsid="004f4fd6" fo:background-color="#ffffff" style:font-size-asian="12pt" style:font-size-complex="12pt"/>
    </style:style>
    <style:style style:name="P5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4f4fd6" officeooo:paragraph-rsid="004f4fd6" fo:background-color="#ffffff" style:font-size-asian="12pt" style:font-size-complex="12pt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officeooo:rsid="004f4fd6" officeooo:paragraph-rsid="00505276" fo:background-color="#ffffff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4f4fd6" officeooo:paragraph-rsid="00505276" fo:background-color="#ffffff" style:font-size-asian="12pt" style:font-size-complex="12pt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officeooo:rsid="00531484" officeooo:paragraph-rsid="00531484" fo:background-color="#ffffff" style:font-size-asian="12pt" style:font-size-complex="12pt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4f4fd6" officeooo:paragraph-rsid="00505276" fo:background-color="#ffffff" style:font-size-asian="12pt" style:font-size-complex="12pt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bold" officeooo:rsid="00584899" officeooo:paragraph-rsid="00584899" fo:background-color="#ffffff" style:font-size-asian="12pt" style:font-weight-asian="bold" style:font-size-complex="12pt" style:font-weight-complex="bold"/>
    </style:style>
    <style:style style:name="P61" style:family="paragraph" style:parent-style-name="Standard">
      <style:paragraph-properties style:line-height-at-least="0.503cm"/>
      <style:text-properties fo:color="#000000" loext:opacity="100%" style:font-name="Arial" fo:font-size="12pt" fo:font-weight="normal" officeooo:rsid="005b1e78" officeooo:paragraph-rsid="005b1e78" fo:background-color="#ffffff" style:font-size-asian="12pt" style:font-size-complex="12pt"/>
    </style:style>
    <style:style style:name="P62" style:family="paragraph" style:parent-style-name="Standard">
      <style:paragraph-properties style:line-height-at-least="0.503cm"/>
      <style:text-properties fo:color="#000000" loext:opacity="100%" style:font-name="Arial" fo:font-size="12pt" fo:font-weight="normal" officeooo:paragraph-rsid="005b1e78" fo:background-color="#ffffff" style:font-size-asian="12pt" style:font-size-complex="12pt"/>
    </style:style>
    <style:style style:name="P6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2d6c9" officeooo:paragraph-rsid="0062d6c9" fo:background-color="#ffffff" style:font-size-asian="12pt" style:font-size-complex="12pt"/>
    </style:style>
    <style:style style:name="P6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302c0" officeooo:paragraph-rsid="006302c0" fo:background-color="#ffffff" style:font-size-asian="12pt" style:font-size-complex="12pt"/>
    </style:style>
    <style:style style:name="P6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2d6c9" officeooo:paragraph-rsid="0064b8bb" fo:background-color="#ffffff" style:font-size-asian="12pt" style:font-size-complex="12pt"/>
    </style:style>
    <style:style style:name="P6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6d836" officeooo:paragraph-rsid="0066d836" fo:background-color="#ffffff" style:font-size-asian="12pt" style:font-size-complex="12pt"/>
    </style:style>
    <style:style style:name="P6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paragraph-rsid="0062d6c9" fo:background-color="#ffffff" style:font-size-asian="12pt" style:font-size-complex="12pt"/>
    </style:style>
    <style:style style:name="P6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rsid="0066dc46" officeooo:paragraph-rsid="0066dc46" fo:background-color="#ffffff" style:font-size-asian="12pt" style:font-size-complex="12pt"/>
    </style:style>
    <style:style style:name="P69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bold" officeooo:paragraph-rsid="0062d6c9" fo:background-color="#ffffff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bold" officeooo:paragraph-rsid="0066dc46" fo:background-color="#ffffff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paragraph-rsid="0066dc46" fo:background-color="#ffffff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paragraph-rsid="006a36f8" fo:background-color="#ffffff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rsid="007188e5" officeooo:paragraph-rsid="007188e5" fo:background-color="#ffffff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rsid="006ee07f" officeooo:paragraph-rsid="006ee07f" fo:background-color="#ffffff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rsid="006da21b" officeooo:paragraph-rsid="006da21b" fo:background-color="#ffffff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 officeooo:rsid="006e6d45" officeooo:paragraph-rsid="006e6d45" fo:background-color="#ffffff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6e6d45" officeooo:paragraph-rsid="006e6d45" fo:background-color="#ffffff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3dafd" officeooo:paragraph-rsid="0073dafd" fo:background-color="#ffffff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officeooo:paragraph-rsid="0073dafd" fo:background-color="#ffffff" style:font-size-asian="12pt" style:font-size-complex="12pt"/>
    </style:style>
    <style:style style:name="P8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background-color="#ffffff" style:font-size-asian="12pt" style:font-size-complex="12pt"/>
    </style:style>
    <style:style style:name="P81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581a2" officeooo:paragraph-rsid="007581a2" fo:background-color="#ffffff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6977c" officeooo:paragraph-rsid="0076977c" fo:background-color="#ffffff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70a7d" officeooo:paragraph-rsid="00770a7d" fo:background-color="#ffffff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6cfd1" officeooo:paragraph-rsid="0076cfd1" fo:background-color="#ffffff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Consolas" fo:font-size="10.5pt" fo:letter-spacing="normal" fo:font-style="normal" fo:font-weight="normal" officeooo:rsid="0076cfd1" officeooo:paragraph-rsid="0076cfd1" fo:background-color="#ffffff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4pt" fo:font-weight="bold" fo:background-color="#ffffff" style:font-size-asian="14pt" style:font-weight-asian="bold" style:font-size-complex="14pt" style:font-weight-complex="bold"/>
    </style:style>
    <style:style style:name="P87" style:family="paragraph" style:parent-style-name="Standard">
      <style:paragraph-properties style:line-height-at-least="0.503cm"/>
      <style:text-properties fo:color="#000000" loext:opacity="100%" style:font-name="Arial" fo:font-size="14pt" fo:background-color="#ffffff" style:font-size-asian="14pt" style:font-size-complex="14pt"/>
    </style:style>
    <style:style style:name="P88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6cfd1" fo:background-color="#ffffff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font-weight="normal" fo:background-color="#ffffff" style:font-size-asian="12pt" style:font-size-complex="12pt"/>
    </style:style>
    <style:style style:name="P90" style:family="paragraph" style:parent-style-name="Standard">
      <style:paragraph-properties style:line-height-at-least="0.503cm"/>
      <style:text-properties fo:color="#000000" loext:opacity="100%" style:font-name="Arial" fo:font-size="12pt" fo:background-color="#ffffff" style:font-size-asian="12pt" style:font-size-complex="12pt"/>
    </style:style>
    <style:style style:name="P91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76cfd1" fo:background-color="#ffffff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2pt" fo:background-color="#ffffff" style:font-size-asian="12pt" style:font-size-complex="12pt"/>
    </style:style>
    <style:style style:name="P93" style:family="paragraph" style:parent-style-name="Standard">
      <style:paragraph-properties style:line-height-at-least="0.503cm"/>
      <style:text-properties fo:font-variant="normal" fo:text-transform="none" fo:color="#000000" loext:opacity="100%" style:font-name="Arial" fo:font-size="12pt" fo:letter-spacing="normal" fo:font-style="normal" fo:font-weight="normal" officeooo:rsid="0076cfd1" fo:background-color="#ffffff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style:line-height-at-least="0.503cm"/>
      <style:text-properties fo:color="#000000" loext:opacity="100%" style:font-name="Arial" fo:font-size="12pt" fo:font-weight="normal" fo:background-color="#fffff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36b3"/>
    </style:style>
    <style:style style:name="T3" style:family="text">
      <style:text-properties officeooo:rsid="00268687"/>
    </style:style>
    <style:style style:name="T4" style:family="text">
      <style:text-properties style:text-line-through-style="none" style:text-line-through-type="none" style:font-name="Liberation Serif" fo:font-size="12pt" style:text-underline-style="none" fo:font-weight="normal" style:text-blinking="false" style:font-size-asian="12pt" style:font-size-complex="12pt" loext:padding="0cm" loext:border="none"/>
    </style:style>
    <style:style style:name="T5" style:family="text">
      <style:text-properties style:text-line-through-style="none" style:text-line-through-type="none" style:font-name="Liberation Serif" fo:font-size="12pt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f0f2f5"/>
    </style:style>
    <style:style style:name="T6" style:family="text">
      <style:text-properties style:text-line-through-style="none" style:text-line-through-type="none" style:font-name="Liberation Serif" fo:font-size="12pt" style:text-underline-style="none" fo:font-weight="bold" style:text-blinking="false" style:font-size-asian="12pt" style:font-size-complex="12pt" loext:padding="0cm" loext:border="none"/>
    </style:style>
    <style:style style:name="T7" style:family="text">
      <style:text-properties style:text-line-through-style="none" style:text-line-through-type="none" style:font-name="Liberation Serif" fo:font-size="12pt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f0f2f5"/>
    </style:style>
    <style:style style:name="T8" style:family="text">
      <style:text-properties style:text-line-through-style="none" style:text-line-through-type="none" style:font-name="Liberation Serif" fo:font-size="12pt" style:text-underline-style="none" fo:font-weight="bold" officeooo:rsid="007e57d1" style:text-blinking="false" style:font-size-asian="12pt" style:font-size-complex="12pt" loext:padding="0cm" loext:border="none"/>
    </style:style>
    <style:style style:name="T9" style:family="text">
      <style:text-properties style:text-line-through-style="none" style:text-line-through-type="none" style:font-name="Liberation Serif" fo:font-size="12pt" style:text-underline-style="none" fo:font-weight="normal" officeooo:rsid="007e57d1" style:text-blinking="false" style:font-size-asian="12pt" style:font-size-complex="12pt" loext:padding="0cm" loext:border="none"/>
    </style:style>
    <style:style style:name="T10" style:family="text">
      <style:text-properties officeooo:rsid="0029054c"/>
    </style:style>
    <style:style style:name="T11" style:family="text">
      <style:text-properties officeooo:rsid="002d647d"/>
    </style:style>
    <style:style style:name="T12" style:family="text">
      <style:text-properties officeooo:rsid="00307bf3"/>
    </style:style>
    <style:style style:name="T13" style:family="text">
      <style:text-properties fo:color="#000000" loext:opacity="100%" fo:background-color="#ffffff" loext:char-shading-value="0"/>
    </style:style>
    <style:style style:name="T14" style:family="text">
      <style:text-properties officeooo:rsid="003a96fa"/>
    </style:style>
    <style:style style:name="T15" style:family="text">
      <style:text-properties officeooo:rsid="003c3200"/>
    </style:style>
    <style:style style:name="T16" style:family="text">
      <style:text-properties officeooo:rsid="0041fe32"/>
    </style:style>
    <style:style style:name="T17" style:family="text">
      <style:text-properties officeooo:rsid="0043855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0804a24"/>
    </style:style>
    <style:style style:name="T20" style:family="text">
      <style:text-properties officeooo:rsid="00828788"/>
    </style:style>
    <style:style style:name="T21" style:family="text">
      <style:text-properties officeooo:rsid="005f10fc"/>
    </style:style>
    <style:style style:name="T22" style:family="text">
      <style:text-properties officeooo:rsid="005f40dd"/>
    </style:style>
    <style:style style:name="T23" style:family="text">
      <style:text-properties officeooo:rsid="00611349"/>
    </style:style>
    <style:style style:name="T24" style:family="text">
      <style:text-properties officeooo:rsid="0066a8c9"/>
    </style:style>
    <style:style style:name="T25" style:family="text">
      <style:text-properties style:text-line-through-style="none" style:text-line-through-type="none" fo:font-family="'Google Sans', Arial, sans-serif" style:text-underline-style="none" fo:font-weight="normal" style:text-blinking="false" loext:padding="0cm" loext:border="none"/>
    </style:style>
    <style:style style:name="T26" style:family="text">
      <style:text-properties style:text-line-through-style="none" style:text-line-through-type="none" fo:font-family="'Google Sans', Arial, sans-serif" style:text-underline-style="none" style:text-blinking="false" loext:padding="0cm" loext:border="non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6a36f8"/>
    </style:style>
    <style:style style:name="T29" style:family="text">
      <style:text-properties officeooo:rsid="006c08c8"/>
    </style:style>
    <style:style style:name="T30" style:family="text">
      <style:text-properties officeooo:rsid="0074553d"/>
    </style:style>
    <style:style style:name="T31" style:family="text">
      <style:text-properties fo:font-weight="normal"/>
    </style:style>
    <style:style style:name="T32" style:family="text">
      <style:text-properties officeooo:rsid="0075a8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Python Otávio Miranda</text:p>
      <text:p text:style-name="P1"/>
      <text:p text:style-name="P2">Comentários em Python é Feito com #(jogo da velha, hashtag po cerquilha)</text:p>
      <text:p text:style-name="P2"/>
      <text:p text:style-name="P3">Python = Linguagem de programação</text:p>
      <text:p text:style-name="P3">Tipo de tipagem = Dinâmica / Forte</text:p>
      <text:p text:style-name="P4"/>
      <text:p text:style-name="P4"/>
      <text:p text:style-name="P4"><text:span text:style-name="T1">Docstring</text:span> é “”” duplos ou <text:s/>‘’’, <text:span text:style-name="T2">serve para criar textos que não irão mostrar na execução do programa, mas ele existe e utiliza espaço na memória em bytes, ele serve para colocar comentários maiores e que utilizam várias linhas.</text:span></text:p>
      <text:p text:style-name="P4"/>
      <text:p text:style-name="P5"><text:span text:style-name="T1">Sep=”- “ </text:span>- utilizando sep, por exemplo no print utilizando argumentos não nomeados é possíveis colocar caracteres entre essas strings ou números.<text:span text:style-name="T3"> </text:span></text:p>
      <text:p text:style-name="P3"/>
      <text:p text:style-name="P6">Escape de Strings é tudo que tenha barra invertida, por exemplo:</text:p>
      <text:p text:style-name="P6"/>
      <text:p text:style-name="P6">\n -Pula a linha</text:p>
      <text:p text:style-name="P6">\t – faz a mesma função que a tecla tab do teclado.</text:p>
      <text:p text:style-name="P6"/>
      <text:p text:style-name="P6">\” - <text:s/>adicionar aspas duplas na strings</text:p>
      <text:p text:style-name="P6">\’ - aspas simples</text:p>
      <text:p text:style-name="P6">\\ - <text:s/>uma barra invertida.</text:p>
      <text:p text:style-name="P6"/>
      <text:p text:style-name="P7"><text:span text:style-name="T4">O </text:span><text:span text:style-name="Source_20_Text"><text:span text:style-name="T5">r <text:s/>- </text:span></text:span><text:span text:style-name="T4">significa </text:span><text:span text:style-name="Strong_20_Emphasis"><text:span text:style-name="T6">Raw</text:span></text:span><text:span text:style-name="T4"> (que em inglês significa -</text:span><text:span text:style-name="Emphasis"><text:span text:style-name="T4">cru</text:span></text:span><text:span text:style-name="T4"> ou </text:span><text:span text:style-name="Emphasis"><text:span text:style-name="T4">bruto</text:span></text:span><text:span text:style-name="T4"> ). </text:span></text:p>
      <text:p text:style-name="P7"><text:span text:style-name="T4">A função dele é </text:span><text:span text:style-name="Strong_20_Emphasis"><text:span text:style-name="T6">desativar</text:span></text:span><text:span text:style-name="T4"> todos os Escapes da string.</text:span></text:p>
      <text:p text:style-name="P3"/>
      <text:p text:style-name="P3"/>
      <text:p text:style-name="P8"><text:span text:style-name="Strong_20_Emphasis"><text:span text:style-name="T6">Com </text:span></text:span><text:span text:style-name="Strong_20_Emphasis"><text:span text:style-name="Source_20_Text"><text:span text:style-name="T7">r</text:span></text:span></text:span><text:span text:style-name="Strong_20_Emphasis"><text:span text:style-name="T6">:</text:span></text:span><text:span text:style-name="T4"> Você digita </text:span><text:span text:style-name="Strong_20_Emphasis"><text:span text:style-name="T6">uma</text:span></text:span><text:span text:style-name="Strong_20_Emphasis"><text:span text:style-name="T8"> \</text:span></text:span><text:span text:style-name="T4"> , aparece </text:span><text:span text:style-name="Strong_20_Emphasis"><text:span text:style-name="T6">uma</text:span></text:span><text:span text:style-name="T4"> </text:span><text:span text:style-name="T9">\</text:span><text:span text:style-name="T4">.</text:span></text:p>
      <text:p text:style-name="P9">Python</text:p>
      <text:p text:style-name="P9"/>
      <text:p text:style-name="P10"><text:span text:style-name="Source_20_Text"><text:span text:style-name="T4">print(r"C:\pasta\arquivo")</text:span></text:span></text:p>
      <text:p text:style-name="P10"><text:span text:style-name="Source_20_Text"><text:span text:style-name="T4"/></text:span></text:p>
      <text:p text:style-name="P10"><text:span text:style-name="Source_20_Text"><text:span text:style-name="T4"># Resultado na tela: C:\pasta\arquivo</text:span></text:span></text:p>
      <text:p text:style-name="P10"><text:span text:style-name="Source_20_Text"><text:span text:style-name="T4"/></text:span></text:p>
      <text:p text:style-name="P11">Use o código com cautela.</text:p>
      <text:p text:style-name="P12"><text:span text:style-name="Strong_20_Emphasis"><text:span text:style-name="T4"/></text:span></text:p>
      <text:p text:style-name="P12"><text:span text:style-name="Strong_20_Emphasis"><text:span text:style-name="T6">Sem </text:span></text:span><text:span text:style-name="Strong_20_Emphasis"><text:span text:style-name="Source_20_Text"><text:span text:style-name="T7">r</text:span></text:span></text:span><text:span text:style-name="Strong_20_Emphasis"><text:span text:style-name="T6">:</text:span></text:span><text:span text:style-name="T4"> Você é obrigado a digitar </text:span><text:span text:style-name="Strong_20_Emphasis"><text:span text:style-name="T6">duas</text:span></text:span><text:span text:style-name="T4"> para aparecer </text:span><text:span text:style-name="Strong_20_Emphasis"><text:span text:style-name="T6">uma</text:span></text:span><text:span text:style-name="T4"> .</text:span></text:p>
      <text:p text:style-name="P11"/>
      <text:p text:style-name="P9">Python</text:p>
      <text:p text:style-name="P9"/>
      <text:p text:style-name="P10"><text:span text:style-name="Source_20_Text"><text:span text:style-name="T4">print("C:</text:span></text:span><text:a xlink:type="simple" xlink:href="file://pasta//arquivo" text:style-name="Internet_20_link" text:visited-style-name="Visited_20_Internet_20_Link"><text:span text:style-name="Source_20_Text">\\pasta\\arquivo</text:span></text:a><text:span text:style-name="Source_20_Text"><text:span text:style-name="T4">")</text:span></text:span></text:p>
      <text:p text:style-name="P10"><text:span text:style-name="Source_20_Text"><text:span text:style-name="T4"/></text:span></text:p>
      <text:p text:style-name="P10"><text:span text:style-name="Source_20_Text"><text:span text:style-name="T4"># Resultado na tela: C:\pasta\arquivo</text:span></text:span></text:p>
      <text:p text:style-name="P3"/>
      <text:p text:style-name="P13">Tipos primitivos em Pytho<text:span text:style-name="T10">n</text:span> mais utilizado:</text:p>
      <text:p text:style-name="P13"/>
      <text:p text:style-name="P13">Str, int, float, bool</text:p>
      <text:p text:style-name="P13"/>
      <text:p text:style-name="P14">str – Strings</text:p>
      <text:p text:style-name="P14"><text:soft-page-break/>int – números inteiros</text:p>
      <text:p text:style-name="P14">float – números <text:span text:style-name="T11">com pontos </text:span>flutantes</text:p>
      <text:p text:style-name="P14">bool – Verdadeiro ou Falso</text:p>
      <text:p text:style-name="P14"/>
      <text:p text:style-name="P15">Type() - mostra o tipo primitivo do seu objeto.</text:p>
      <text:p text:style-name="P15"/>
      <text:p text:style-name="P16">Tipo primitivo bool(boolean)</text:p>
      <text:p text:style-name="P16">No bool existem somente duas respostas: que é True ou False(verdadeiro ou Falso)</text:p>
      <text:p text:style-name="P16"/>
      <text:p text:style-name="P17">Coerção de Tipos primitivo – converte um tipo primitivo para outro, <text:span text:style-name="T12">veja exemplo abaixo</text:span></text:p>
      <text:p text:style-name="P17"/>
      <text:p text:style-name="P18"><text:span text:style-name="T12">int(</text:span>“<text:span text:style-name="T12">11”) + 11 == 22 – o onze é uma string, convertendo passa a ser um número inteiro, se não converter vai dar erro.</text:span></text:p>
      <text:p text:style-name="P18"/>
      <text:p text:style-name="P18"># conversão de tipos, coerção</text:p>
      <text:p text:style-name="P18"># type convertion, typecasting, coercion</text:p>
      <text:p text:style-name="P18"># é o ato de converter um tipo em outro</text:p>
      <text:p text:style-name="P18"># <text:s/>tipos imutáveis e primitivos:</text:p>
      <text:p text:style-name="P18"># str, int, float, bool</text:p>
      <text:p text:style-name="P18"/>
      <text:p text:style-name="P18">print(int('1'), type(int('1')))</text:p>
      <text:p text:style-name="P18">print(type(float('1') + 1))</text:p>
      <text:p text:style-name="P18">print(bool(' '))</text:p>
      <text:p text:style-name="P18">print(str(11) + 'b')</text:p>
      <text:p text:style-name="P18"/>
      <text:p text:style-name="P19">Introdução as váriaveis Python:</text:p>
      <text:p text:style-name="P18"/>
      <text:p text:style-name="P18"># Variáveis são usadas para salvar algo na memória do computador.</text:p>
      <text:p text:style-name="P18"># PEP8: inicie variáveis com letras minúsculas, pode usar</text:p>
      <text:p text:style-name="P18"># números e underline _.</text:p>
      <text:p text:style-name="P18"># O sinal de = é o operador de atribuição. Ele é usado para</text:p>
      <text:p text:style-name="P18"># atribuir um valor a um nome (variável).</text:p>
      <text:p text:style-name="P18"># Uso: nome_variavel = expressão</text:p>
      <text:p text:style-name="P18"/>
      <text:p text:style-name="P18"># nome_completo = 'Luiz Otávio Miranda'</text:p>
      <text:p text:style-name="P18"># soma_dois_mais_dois = 2 + 2</text:p>
      <text:p text:style-name="P18"># int_um = bool('1')</text:p>
      <text:p text:style-name="P18"># print(int_um, type(int_um))</text:p>
      <text:p text:style-name="P18"># print(nome_completo, soma_dois_mais_dois)</text:p>
      <text:p text:style-name="P18"/>
      <text:p text:style-name="P18">nome = 'Luiz'</text:p>
      <text:p text:style-name="P18">idade = 17</text:p>
      <text:p text:style-name="P18">maior_de_idade = idade &gt;= 18</text:p>
      <text:p text:style-name="P18">print('Nome:', nome, 'Idade:', idade)</text:p>
      <text:p text:style-name="P18">print('É maior?', maior_de_idade)</text:p>
      <text:p text:style-name="P18"/>
      <text:p text:style-name="P20">Introdução aos operadores aritméticos:</text:p>
      <text:p text:style-name="P21"/>
      <text:p text:style-name="P21">adicao = 10 + 10</text:p>
      <text:p text:style-name="P21">print('Adição', adicao)</text:p>
      <text:p text:style-name="P21"/>
      <text:p text:style-name="P21">subtracao = 10 - 5</text:p>
      <text:p text:style-name="P21"><text:soft-page-break/>print('Subtração', subtracao)</text:p>
      <text:p text:style-name="P21"/>
      <text:p text:style-name="P21">multiplicacao = 10 * 10</text:p>
      <text:p text:style-name="P21">print('Multiplicação', multiplicacao)</text:p>
      <text:p text:style-name="P21"/>
      <text:p text:style-name="P21">divisao = 10 / 3 <text:s/># float</text:p>
      <text:p text:style-name="P21">print('Divisão', divisao)</text:p>
      <text:p text:style-name="P21"/>
      <text:p text:style-name="P21">divisao_inteira = 10 // 3</text:p>
      <text:p text:style-name="P21">print('Divisão inteira', divisao_inteira)</text:p>
      <text:p text:style-name="P21"/>
      <text:p text:style-name="P21">exponenciacao = 2 ** 10</text:p>
      <text:p text:style-name="P21">print('Exponenciação', exponenciacao)</text:p>
      <text:p text:style-name="P21"/>
      <text:p text:style-name="P21">modulo = 55 % 2 <text:s/># resto da divisão</text:p>
      <text:p text:style-name="P21">print('Módulo', modulo)</text:p>
      <text:p text:style-name="P21"/>
      <text:p text:style-name="P22"># Aqui está sendo verificado se é ou não divisivel pelos valores, e o resultado vai ser booleano, se é True ou False:</text:p>
      <text:p text:style-name="P22"/>
      <text:p text:style-name="P21">print(10 % 8 == 0)</text:p>
      <text:p text:style-name="P21">print(16 % 8 == 0)</text:p>
      <text:p text:style-name="P23"/>
      <text:p text:style-name="P24"># Aqui você pode verificar se o número é par ou impar, e o resultado também é booleano:</text:p>
      <text:p text:style-name="P23"/>
      <text:p text:style-name="P21"><text:span text:style-name="T13">print(10 % 2 == </text:span>0)</text:p>
      <text:p text:style-name="P21">print(15 % 2 == 0)</text:p>
      <text:p text:style-name="P21">print(16 % 2 == 0)</text:p>
      <text:p text:style-name="P21"/>
      <text:p text:style-name="P25">Concatenação e repetição com operadores aritméticos:</text:p>
      <text:p text:style-name="P26"/>
      <text:p text:style-name="P27">Juntando um nome com outro:</text:p>
      <text:p text:style-name="P27"/>
      <text:p text:style-name="P27">concatenacao = 'Luiz' + ' ' + 'Otávio'</text:p>
      <text:p text:style-name="P27">print(concatenacao)</text:p>
      <text:p text:style-name="P27"/>
      <text:p text:style-name="P28">Resultado:</text:p>
      <text:p text:style-name="P28">Luiz Otávio</text:p>
      <text:p text:style-name="P27"/>
      <text:p text:style-name="P27">Replicando letras com o sinal de multiplicação, <text:span text:style-name="T14">fazendo repetição das letras</text:span>:</text:p>
      <text:p text:style-name="P27"/>
      <text:p text:style-name="P27">a_dez_vezes = 'A' * 10</text:p>
      <text:p text:style-name="P27">tres_vezes_luiz = 3 * 'Luiz'</text:p>
      <text:p text:style-name="P27">print(a_dez_vezes)</text:p>
      <text:p text:style-name="P27">print(tres_vezes_luiz)</text:p>
      <text:p text:style-name="P27"/>
      <text:p text:style-name="P28">Resultados:</text:p>
      <text:p text:style-name="P28"/>
      <text:p text:style-name="P28">AAAAAAAAAA</text:p>
      <text:p text:style-name="P28">LuizLuizLuiz</text:p>
      <text:p text:style-name="P28"/>
      <text:p text:style-name="P29">precedência entre operadores aritméticos:</text:p>
      <text:p text:style-name="P30"><text:soft-page-break/>Tudo que estiver entre parênteses é executado primeiro:</text:p>
      <text:p text:style-name="P31"/>
      <text:p text:style-name="P31"># 1. (n + n) </text:p>
      <text:p text:style-name="P31"/>
      <text:p text:style-name="P30">se não, a ordem é da forma que está abaixo:</text:p>
      <text:p text:style-name="P30"/>
      <text:p text:style-name="P28"># 2. ** - <text:span text:style-name="T15">Potenciação</text:span></text:p>
      <text:p text:style-name="P28"># 3. * / // % - <text:span text:style-name="T15">Multiplicação, divisão, divisão inteira, resto da divisão</text:span></text:p>
      <text:p text:style-name="P28"># 4. + - : <text:span text:style-name="T15">adição e subtração</text:span></text:p>
      <text:p text:style-name="P28"/>
      <text:p text:style-name="P28">conta_1 = (1 + int(0.5 + 0.5)) ** (5 + 5)</text:p>
      <text:p text:style-name="P28">print(conta_1)</text:p>
      <text:p text:style-name="P28"/>
      <text:p text:style-name="P32">Resultado:</text:p>
      <text:p text:style-name="P32"/>
      <text:p text:style-name="P32">1024</text:p>
      <text:p text:style-name="P28"/>
      <text:p text:style-name="P33">Introdução as f-strings, formatação de string:</text:p>
      <text:p text:style-name="P34"/>
      <text:p text:style-name="P28">nome = 'Luiz Otávio'</text:p>
      <text:p text:style-name="P28">altura = 1.80</text:p>
      <text:p text:style-name="P28">peso = 95</text:p>
      <text:p text:style-name="P28">imc = peso / altura ** 2</text:p>
      <text:p text:style-name="P28"/>
      <text:p text:style-name="P28">"f-strings"</text:p>
      <text:p text:style-name="P28"/>
      <text:p text:style-name="P28">linha_1 = f'{nome} tem {altura:.2f} de altura,'</text:p>
      <text:p text:style-name="P28">linha_2 = f'pesa {peso} quilos e seu imc é'</text:p>
      <text:p text:style-name="P28">linha_3 = f'{imc:.2f}'</text:p>
      <text:p text:style-name="P28"/>
      <text:p text:style-name="P28">print(linha_1)</text:p>
      <text:p text:style-name="P28">print(linha_2)</text:p>
      <text:p text:style-name="P28">print(linha_3)</text:p>
      <text:p text:style-name="P28"/>
      <text:p text:style-name="P35">Resultado:</text:p>
      <text:p text:style-name="P35"/>
      <text:p text:style-name="P28"># Luiz Otávio tem 1.80 de altura,</text:p>
      <text:p text:style-name="P28"># pesa 95 quilos e seu IMC é</text:p>
      <text:p text:style-name="P28"># 29.320987654320987</text:p>
      <text:p text:style-name="P28"/>
      <text:p text:style-name="P36">Formatação de Strings com o método format:</text:p>
      <text:p text:style-name="P37"/>
      <text:p text:style-name="P38"># Aqui o professsor colocou tudo em variáveis, pode ser utilizado somente as 3 variáve<text:span text:style-name="T16">i</text:span>s abaixo:</text:p>
      <text:p text:style-name="P38"/>
      <text:p text:style-name="P28">a = 'AAAAA'</text:p>
      <text:p text:style-name="P28">b = 'BBBBBB'</text:p>
      <text:p text:style-name="P28">c = 1.1</text:p>
      <text:p text:style-name="P28"/>
      <text:p text:style-name="P28">string = 'b={nome2} a={nome1} a={nome1} c={nome3:.2f}'</text:p>
      <text:p text:style-name="P28">formato = string.format(nome1=a, nome2=b, nome3=c)<text:span text:style-name="T17"># aqui você está nomeando suas variáveis</text:span></text:p>
      <text:p text:style-name="P28"/>
      <text:p text:style-name="P28">print(formato)</text:p>
      <text:p text:style-name="P39"><text:soft-page-break/>Exemplo simples:</text:p>
      <text:p text:style-name="P40"/>
      <text:p text:style-name="P41">a = 'AAAAA'</text:p>
      <text:p text:style-name="P42">b = 'BBBBBB'</text:p>
      <text:p text:style-name="P42">c = 1.1</text:p>
      <text:p text:style-name="P43"/>
      <text:p text:style-name="P42">print("A= {}, B= {}, C= {}".format(a, b, c))</text:p>
      <text:p text:style-name="P42"/>
      <text:p text:style-name="P44">resultado:</text:p>
      <text:p text:style-name="P44"/>
      <text:p text:style-name="P44">A= AAAAA, B= BBBBBB, C= 1.1</text:p>
      <text:p text:style-name="P42"/>
      <text:p text:style-name="P45"><text:span text:style-name="T18">Usando</text:span><text:span text:style-name="T1"> a função input para coletar dados do usuário:</text:span></text:p>
      <text:p text:style-name="P45"/>
      <text:p text:style-name="P46">nome = input('Qual o seu nome? ')</text:p>
      <text:p text:style-name="P47">print(f'O seu nome é {nome=}')</text:p>
      <text:p text:style-name="P43"/>
      <text:p text:style-name="P47">#se dentro das chaves{} você colocar = na frente, vai mostrar o nome da variável igual o valor da variável.</text:p>
      <text:p text:style-name="P47">"""</text:p>
      <text:p text:style-name="P47">resultado:</text:p>
      <text:p text:style-name="P43"/>
      <text:p text:style-name="P47">Qual o seu nome? David</text:p>
      <text:p text:style-name="P47">O seu nome é nome='David'</text:p>
      <text:p text:style-name="P43"/>
      <text:p text:style-name="P47">O input sempre vai receber uma string </text:p>
      <text:p text:style-name="P43"/>
      <text:p text:style-name="P47">"""</text:p>
      <text:p text:style-name="P43"/>
      <text:p text:style-name="P47">numero_1 = int(input('Digite um número: ')) # É possivel colocar int</text:p>
      <text:p text:style-name="P47"># na frente do input diretamente, mas o professor falou que pode </text:p>
      <text:p text:style-name="P47"># dar problemas futuros, dependendo do código</text:p>
      <text:p text:style-name="P47">numero_2 = input('Digite outro número: ')</text:p>
      <text:p text:style-name="P43"/>
      <text:p text:style-name="P47">int_numero_1 = int(numero_1)# convertendo o número string para int com outra variável</text:p>
      <text:p text:style-name="P47">int_numero_2 = int(numero_2)</text:p>
      <text:p text:style-name="P43"/>
      <text:p text:style-name="P47">print(f'A soma dos números é: {int_numero_1 + int_numero_2}')</text:p>
      <text:p text:style-name="P48"/>
      <text:p text:style-name="P49"># Introdução a estrutura condicional if/elif/else</text:p>
      <text:p text:style-name="P43"/>
      <text:p text:style-name="P47"># if / elif / else</text:p>
      <text:p text:style-name="P47"># se / se não se / se não</text:p>
      <text:p text:style-name="P47">entrada = input('Você quer "entrar" ou "sair"? ')</text:p>
      <text:p text:style-name="P43"/>
      <text:p text:style-name="P47">if entrada == 'entrar':</text:p>
      <text:p text:style-name="P47">print('Você entrou no sistema')</text:p>
      <text:p text:style-name="P43"/>
      <text:p text:style-name="P47">print(12341234)</text:p>
      <text:p text:style-name="P47"><text:soft-page-break/># O IF sempre vai ser uma condição verdadeira.</text:p>
      <text:p text:style-name="P47">elif entrada == 'sair':</text:p>
      <text:p text:style-name="P47">print('Você saiu do sistema')</text:p>
      <text:p text:style-name="P47">else:</text:p>
      <text:p text:style-name="P47">print('Você não digitou nem entrar e nem sair.')</text:p>
      <text:p text:style-name="P43"/>
      <text:p text:style-name="P47">print('FORA DOS BLOCOS')</text:p>
      <text:p text:style-name="P43"/>
      <text:p text:style-name="P47"># Entendendo o fluxo do interpretador em condicionais:</text:p>
      <text:p text:style-name="P43"/>
      <text:p text:style-name="P47"># if / elif / else</text:p>
      <text:p text:style-name="P47"># se / se não se / se não</text:p>
      <text:p text:style-name="P43"/>
      <text:p text:style-name="P47">condicao1 = True</text:p>
      <text:p text:style-name="P47">condicao2 = True</text:p>
      <text:p text:style-name="P47">condicao3 = True</text:p>
      <text:p text:style-name="P47">condicao4 = True</text:p>
      <text:p text:style-name="P43"/>
      <text:p text:style-name="P47">if condicao1:</text:p>
      <text:p text:style-name="P47">print('Código para condição 1')</text:p>
      <text:p text:style-name="P47">print('Código para condição 1')</text:p>
      <text:p text:style-name="P47">elif condicao2:</text:p>
      <text:p text:style-name="P47">print('Código para condição 2')</text:p>
      <text:p text:style-name="P47">elif condicao3:</text:p>
      <text:p text:style-name="P47">print('Código para condição 3')</text:p>
      <text:p text:style-name="P47">elif condicao4:</text:p>
      <text:p text:style-name="P47">print('Código para condição 4')</text:p>
      <text:p text:style-name="P47">else:</text:p>
      <text:p text:style-name="P47">print('Nenhuma condição foi satisfeita.')</text:p>
      <text:p text:style-name="P43"/>
      <text:p text:style-name="P47">if 10 == 10:</text:p>
      <text:p text:style-name="P47">print('Outro if')</text:p>
      <text:p text:style-name="P43"/>
      <text:p text:style-name="P47">print('Fora do if')</text:p>
      <text:p text:style-name="P42"/>
      <text:p text:style-name="P47">se você colocar dentro das condições, </text:p>
      <text:p text:style-name="P47">se não tiver nenhum código ainda, para não dar </text:p>
      <text:p text:style-name="P47">erro é só colocar elipses(...) ou pass, isso serve </text:p>
      <text:p text:style-name="P47">Estrutura condicionais e estrutura de repetição.</text:p>
      <text:p text:style-name="P47"/>
      <text:p text:style-name="P47"/>
      <text:p text:style-name="P50">Operadores de comparação (relacionais)</text:p>
      <text:p text:style-name="P51"/>
      <text:p text:style-name="P47">OP Significado Exemplo (True)</text:p>
      <text:p text:style-name="P47">&gt; maior 2 &gt; 1</text:p>
      <text:p text:style-name="P47">&gt;= maior ou igual 2 &gt;= 2</text:p>
      <text:p text:style-name="P47">&lt; menor 1 &lt; 2</text:p>
      <text:p text:style-name="P47">&lt;= menor ou igual 2 &lt;= 2</text:p>
      <text:p text:style-name="P47">== igual 'a' == 'a'</text:p>
      <text:p text:style-name="P47">!= diferente 'a' != 'b'</text:p>
      <text:p text:style-name="P47"/>
      <text:p text:style-name="P47"><text:soft-page-break/>maior = 2 &gt; 1</text:p>
      <text:p text:style-name="P47">maior_ou_igual = 2 &gt;= 2</text:p>
      <text:p text:style-name="P47">menor = 1 &lt; 2</text:p>
      <text:p text:style-name="P47">menor_ou_igual = 2 &lt;= 2</text:p>
      <text:p text:style-name="P47">igual = 'a' == 'a'</text:p>
      <text:p text:style-name="P47">diferente = 'a' != 'b'</text:p>
      <text:p text:style-name="P47">print('Olha meu print aqui')</text:p>
      <text:p text:style-name="P47"/>
      <text:p text:style-name="P50"># Operadores lógicos</text:p>
      <text:p text:style-name="P43"/>
      <text:p text:style-name="P47"># and (e) or (ou) not (não)</text:p>
      <text:p text:style-name="P47"># and - Todas as condições precisam ser</text:p>
      <text:p text:style-name="P47"># verdadeiras.</text:p>
      <text:p text:style-name="P43"/>
      <text:p text:style-name="P47"># Se qualquer valor for considerado falso,</text:p>
      <text:p text:style-name="P47"># a expressão inteira será avaliada naquele valor</text:p>
      <text:p text:style-name="P47"># São considerados falsy (que vc já viu)</text:p>
      <text:p text:style-name="P47"># 0 0.0 '' False</text:p>
      <text:p text:style-name="P43"/>
      <text:p text:style-name="P47"># Também existe o tipo None que é</text:p>
      <text:p text:style-name="P47"># usado para representar um não valor</text:p>
      <text:p text:style-name="P43"/>
      <text:p text:style-name="P47"># entrada = input('[E]ntrar [S]air: ')</text:p>
      <text:p text:style-name="P47"># senha_digitada = input('Senha: ')</text:p>
      <text:p text:style-name="P43"/>
      <text:p text:style-name="P47"># senha_permitida = '123456'</text:p>
      <text:p text:style-name="P43"/>
      <text:p text:style-name="P47"># if entrada == 'E' and senha_digitada == senha_permitida:</text:p>
      <text:p text:style-name="P47"># print('Entrar')</text:p>
      <text:p text:style-name="P47"># else:</text:p>
      <text:p text:style-name="P47"># print('Sair')</text:p>
      <text:p text:style-name="P43"/>
      <text:p text:style-name="P47"># Avaliação de curto circuito</text:p>
      <text:p text:style-name="P47">print(True and False and True)</text:p>
      <text:p text:style-name="P47">print(True and 0 and True)</text:p>
      <text:p text:style-name="P43"/>
      <text:p text:style-name="P47">if 1 and 1:</text:p>
      <text:p text:style-name="P47">print(True and 1 and False)</text:p>
      <text:p text:style-name="P43"/>
      <text:p text:style-name="P47"># Resultado:</text:p>
      <text:p text:style-name="P43"/>
      <text:p text:style-name="P47"># True</text:p>
      <text:p text:style-name="P47"># 0 - zero é considerado falsy(False)</text:p>
      <text:p text:style-name="P47"># False</text:p>
      <text:p text:style-name="P52"/>
      <text:p text:style-name="P53"># Operador lógico or:</text:p>
      <text:p text:style-name="P54"/>
      <text:p text:style-name="P55">if (entrada == 'E' or entrada == 'e') and senha_digitada == senha_permitida:</text:p>
      <text:p text:style-name="P47"># print('Entrar')</text:p>
      <text:p text:style-name="P47"># else:</text:p>
      <text:p text:style-name="P47"># print('Sair')</text:p>
      <text:p text:style-name="P43"><text:soft-page-break/></text:p>
      <text:p text:style-name="P47"># Avaliação de curto circuito</text:p>
      <text:p text:style-name="P47">senha = input('Senha: ') or 'Sem senha'</text:p>
      <text:p text:style-name="P53"/>
      <text:p text:style-name="P56"># Operador lógico "not"</text:p>
      <text:p text:style-name="P56"/>
      <text:p text:style-name="P57"># Usado para inverter expressões</text:p>
      <text:p text:style-name="P57"># not True = False# not False = True</text:p>
      <text:p text:style-name="P57"># senha = input('Senha: ')print(not True) <text:s/></text:p>
      <text:p text:style-name="P57"># Falseprint(not False) <text:s/># True</text:p>
      <text:p text:style-name="P57"/>
      <text:p text:style-name="P56"># Operadores in e not in</text:p>
      <text:p text:style-name="P57"/>
      <text:p text:style-name="P57"># Strings são iteráveis</text:p>
      <text:p text:style-name="P57"/>
      <text:p text:style-name="P57"># <text:s/>0 1 2 3 4 5</text:p>
      <text:p text:style-name="P57"># <text:s/>O t á v i o</text:p>
      <text:p text:style-name="P57"># -6-5-4-3-2-1</text:p>
      <text:p text:style-name="P57"/>
      <text:p text:style-name="P57"># nome = 'Otávio'</text:p>
      <text:p text:style-name="P57"># print(nome[2])</text:p>
      <text:p text:style-name="P57"># print(nome[-4])</text:p>
      <text:p text:style-name="P57"># print('vio' in nome)</text:p>
      <text:p text:style-name="P57"># print('zero' in nome)</text:p>
      <text:p text:style-name="P57"># print(10 * '-')</text:p>
      <text:p text:style-name="P57"># print('vio' not in nome)</text:p>
      <text:p text:style-name="P57"># print('zero' not in nome)</text:p>
      <text:p text:style-name="P57"/>
      <text:p text:style-name="P57">nome = input('Digite seu nome: ')</text:p>
      <text:p text:style-name="P57">encontrar = input('Digite o que deseja encontrar: ')</text:p>
      <text:p text:style-name="P57"/>
      <text:p text:style-name="P57">if encontrar in nome:</text:p>
      <text:p text:style-name="P57"><text:s text:c="4"/>print(f'{encontrar} está em {nome}')</text:p>
      <text:p text:style-name="P57">else:</text:p>
      <text:p text:style-name="P57"><text:s text:c="4"/>print(f'{encontrar} não está em {nome}')</text:p>
      <text:p text:style-name="P57"/>
      <text:p text:style-name="P56">Interpolação básica de strings:</text:p>
      <text:p text:style-name="P57"/>
      <text:p text:style-name="P57">s - string</text:p>
      <text:p text:style-name="P57">d e i - int</text:p>
      <text:p text:style-name="P57">f - float</text:p>
      <text:p text:style-name="P57">x e X - Hexadecimal (ABCDEF0123456789)</text:p>
      <text:p text:style-name="P57"/>
      <text:p text:style-name="P57">nome = 'Luiz'</text:p>
      <text:p text:style-name="P57">preco = 1000.95897643</text:p>
      <text:p text:style-name="P57">variavel = '%s, o preço é R$%.2f' % (nome, preco)</text:p>
      <text:p text:style-name="P58">]</text:p>
      <text:p text:style-name="P57">print(variavel)</text:p>
      <text:p text:style-name="P57">print('O hexadecimal de %d é %08X' % (1500, 1500))</text:p>
      <text:p text:style-name="P59">""</text:p>
      <text:p text:style-name="P50">Formatação básica de strings</text:p>
      <text:p text:style-name="P50"><text:soft-page-break/></text:p>
      <text:p text:style-name="P47">s - string</text:p>
      <text:p text:style-name="P47">d - int</text:p>
      <text:p text:style-name="P47">f - float</text:p>
      <text:p text:style-name="P47">.&lt;número de dígitos&gt;f</text:p>
      <text:p text:style-name="P47">x ou X - Hexadecimal</text:p>
      <text:p text:style-name="P47">(Caractere)(&gt;&lt;^)(quantidade)</text:p>
      <text:p text:style-name="P47">&gt; - Esquerda</text:p>
      <text:p text:style-name="P47">&lt; - Direita</text:p>
      <text:p text:style-name="P47">^ - Centro</text:p>
      <text:p text:style-name="P47">= - Força o número a aparecer antes dos zeros</text:p>
      <text:p text:style-name="P47">Sinal - + ou -</text:p>
      <text:p text:style-name="P47">Ex.: 0&gt;-100,.1f</text:p>
      <text:p text:style-name="P47">Conversion flags - !r !s !a </text:p>
      <text:p text:style-name="P47">"""</text:p>
      <text:p text:style-name="P47">variavel = 'ABC'</text:p>
      <text:p text:style-name="P47">print(f'{variavel}')</text:p>
      <text:p text:style-name="P47">print(f'{variavel: &gt;10}')</text:p>
      <text:p text:style-name="P47">print(f'{variavel: &lt;10}.')</text:p>
      <text:p text:style-name="P47">print(f'{variavel: ^10}.')</text:p>
      <text:p text:style-name="P47">print(f'{1000.4873648123746:0=+10,.1f}')</text:p>
      <text:p text:style-name="P47">print(f'O hexadecimal de 1500 é {1500:08X}')</text:p>
      <text:p text:style-name="P47">print(f'{variavel!r}')</text:p>
      <text:p text:style-name="P43"/>
      <text:p text:style-name="P47">"""</text:p>
      <text:p text:style-name="P50">Fatiamento de strings</text:p>
      <text:p text:style-name="P50"/>
      <text:p text:style-name="P47">012345678</text:p>
      <text:p text:style-name="P47">Olá mundo</text:p>
      <text:p text:style-name="P47">-987654321</text:p>
      <text:p text:style-name="P47">Fatiamento [i:f:p] [::]</text:p>
      <text:p text:style-name="P47">Obs.: a função len retorna a qtd </text:p>
      <text:p text:style-name="P47">de caracteres da str</text:p>
      <text:p text:style-name="P47">"""</text:p>
      <text:p text:style-name="P47">variavel = 'Olá mundo'</text:p>
      <text:p text:style-name="P47">print(variavel[::-1])</text:p>
      <text:p text:style-name="P57"/>
      <text:p text:style-name="P60">Introdução ao try e except para capturar erros:</text:p>
      <text:p text:style-name="P60"/>
      <text:p text:style-name="P60"/>
      <text:p text:style-name="P47">try:</text:p>
      <text:p text:style-name="P47">print(int("a"))</text:p>
      <text:p text:style-name="P47">except:</text:p>
      <text:p text:style-name="P47">print("Esse valor não é um número inteiro")</text:p>
      <text:p text:style-name="P43"/>
      <text:p text:style-name="P47">try:</text:p>
      <text:p text:style-name="P47">numero = input("Dobrar o núnero que você digita: ")</text:p>
      <text:p text:style-name="P43"/>
      <text:p text:style-name="P47">numero_float = float(numero)</text:p>
      <text:p text:style-name="P43"/>
      <text:p text:style-name="P47">print(f"O dobro de {numero} é {numero_float * 2:.2f}.")</text:p>
      <text:p text:style-name="P47"><text:soft-page-break/>except:</text:p>
      <text:p text:style-name="P47">print("O valor não é um número!")</text:p>
      <text:p text:style-name="P43"/>
      <text:p text:style-name="P47">"""</text:p>
      <text:p text:style-name="P47">O programa acima poderia ser resolvido com if e else, </text:p>
      <text:p text:style-name="P47">mas o programa seria todo executado, mas o erro seria </text:p>
      <text:p text:style-name="P47">escondido pelo else, try e except vai fazer o código</text:p>
      <text:p text:style-name="P47">parar de <text:span text:style-name="T19">i</text:span>mediato ao erro, e o nome disso é fail fast </text:p>
      <text:p text:style-name="P47">- falha rápida, e não vai executar o restante do código,</text:p>
      <text:p text:style-name="P47">vai direto para o except.</text:p>
      <text:p text:style-name="P47">Utilizar o except sem expecificar o erro é errado, isso</text:p>
      <text:p text:style-name="P47">vai ser <text:span text:style-name="T19">ensinado</text:span> mais a frente.</text:p>
      <text:p text:style-name="P47">"""</text:p>
      <text:p text:style-name="P42"/>
      <text:p text:style-name="P42">""</text:p>
      <text:p text:style-name="P50">Variáveis, constantes e complexidade de código.</text:p>
      <text:p text:style-name="P43"/>
      <text:p text:style-name="P47">Constante = "Variáveis" que não iram mudar</text:p>
      <text:p text:style-name="P47">Muitas condicões no mesmo if (ruim)</text:p>
      <text:p text:style-name="P47">&lt;- Contagem de Complexidade (ruim)</text:p>
      <text:p text:style-name="P47">"""</text:p>
      <text:p text:style-name="P43"/>
      <text:p text:style-name="P47">velocidade = 61</text:p>
      <text:p text:style-name="P47">local_carro = 100</text:p>
      <text:p text:style-name="P43"/>
      <text:p text:style-name="P47"># No Python é utilizado letras maiúsculas para variáveis </text:p>
      <text:p text:style-name="P47"># que não vai mudar no código, isso é uma convenção entre os</text:p>
      <text:p text:style-name="P47"># progr<text:span text:style-name="T20">a</text:span>madores python, isso vai mostrar para outros programadores</text:p>
      <text:p text:style-name="P47"># que essas váriáveis são constantes.</text:p>
      <text:p text:style-name="P43"/>
      <text:p text:style-name="P47">RADAR_1 = 60 # Velocidade atual do carro</text:p>
      <text:p text:style-name="P47">LOCAL_1 = 100 # Local onde o radar 1 está</text:p>
      <text:p text:style-name="P47">RADAR_RANGE = 1 # A distância onde o radar pega.</text:p>
      <text:p text:style-name="P43"/>
      <text:p text:style-name="P47">vel_carro_pass_radar_1 = velocidade &gt; RADAR_1</text:p>
      <text:p text:style-name="P47">carro_passou_radar_1 = local_carro &gt;= (LOCAL_1 - RADAR_RANGE) and \</text:p>
      <text:p text:style-name="P47">local_carro &lt;= (LOCAL_1 + RADAR_RANGE)</text:p>
      <text:p text:style-name="P47">carro_multado_radar_1 = carro_passou_radar_1 and vel_carro_pass_radar_1</text:p>
      <text:p text:style-name="P43"/>
      <text:p text:style-name="P47">if vel_carro_pass_radar_1:</text:p>
      <text:p text:style-name="P47">print('Velocidade carro passou do radar 1')</text:p>
      <text:p text:style-name="P43"/>
      <text:p text:style-name="P47">if carro_passou_radar_1:</text:p>
      <text:p text:style-name="P47">print('Carro passou radar 1')</text:p>
      <text:p text:style-name="P43"/>
      <text:p text:style-name="P47">if carro_multado_radar_1:</text:p>
      <text:p text:style-name="P47">print('carro multado em radar 1')</text:p>
      <text:p text:style-name="P43"/>
      <text:p text:style-name="P47">"""</text:p>
      <text:p text:style-name="P47">O que o professor está querendo mostrar aqui é, que é necessário </text:p>
      <text:p text:style-name="P47">deixar o código limpo e legível, deixar o código o mais </text:p>
      <text:p text:style-name="P47"><text:soft-page-break/>simples possível, colocando códigos em variáveis etc, para não</text:p>
      <text:p text:style-name="P47">deixar o código bagunçado, para futuramente você ou outro programador</text:p>
      <text:p text:style-name="P47">entender o código.</text:p>
      <text:p text:style-name="P47">"""</text:p>
      <text:p text:style-name="P47"/>
      <text:p text:style-name="P47">"""</text:p>
      <text:p text:style-name="P47">Flag(Bandeira) - Marcar um Local</text:p>
      <text:p text:style-name="P47">None = Não valor</text:p>
      <text:p text:style-name="P47">is e is not = é ou não é(tipo, valor, identidade)</text:p>
      <text:p text:style-name="P47">id = Identidade</text:p>
      <text:p text:style-name="P47">"""</text:p>
      <text:p text:style-name="P43"/>
      <text:p text:style-name="P47">condicao = False</text:p>
      <text:p text:style-name="P47">passou_no_if = None</text:p>
      <text:p text:style-name="P43"/>
      <text:p text:style-name="P47">if condicao:</text:p>
      <text:p text:style-name="P47">passou_no_if = True</text:p>
      <text:p text:style-name="P47">print("Faça algo")</text:p>
      <text:p text:style-name="P47">else:</text:p>
      <text:p text:style-name="P47">print("Não faça algo")</text:p>
      <text:p text:style-name="P43"/>
      <text:p text:style-name="P47">print(passou_no_if, passou_no_if is None)</text:p>
      <text:p text:style-name="P47">print(passou_no_if, passou_no_if is not None)</text:p>
      <text:p text:style-name="P43"/>
      <text:p text:style-name="P47"># Para ver a identidade das variáveis é utilizado o id():</text:p>
      <text:p text:style-name="P43"/>
      <text:p text:style-name="P47"># v1 = "a"</text:p>
      <text:p text:style-name="P47"># print(id(v1))</text:p>
      <text:p text:style-name="P43"/>
      <text:p text:style-name="P47"># resultado:</text:p>
      <text:p text:style-name="P43"/>
      <text:p text:style-name="P47"># 11789264 - é a identidade de uma variável na memória.</text:p>
      <text:p text:style-name="P42"/>
      <text:p text:style-name="P61">Tipos built-in, documentação, tipo imutáveis, métodos de strings:</text:p>
      <text:p text:style-name="P62"/>
      <text:p text:style-name="P47">https://docs.python.org/pt-br/3/library/stdtypes.html</text:p>
      <text:p text:style-name="P47">Imutáveis que vimos: str, int, float, bool – <text:span text:style-name="T21">são objetos e dentro deles existe ações que podem ser executados dentro destes objetos.</text:span></text:p>
      <text:p text:style-name="P47"/>
      <text:p text:style-name="P47">string = '1000' – <text:span text:style-name="T21">Este valor é imutável, você não consegue mudar ele</text:span></text:p>
      <text:p text:style-name="P47"/>
      <text:p text:style-name="P47"># outra_variavel = f'{string[:3]}ABC{string[4:]}' <text:span text:style-name="T21">é possível modificar criando outra variável</text:span></text:p>
      <text:p text:style-name="P47"/>
      <text:p text:style-name="P47"># print(string)</text:p>
      <text:p text:style-name="P47"/>
      <text:p text:style-name="P63">resposta:</text:p>
      <text:p text:style-name="P63"/>
      <text:p text:style-name="P63">1000</text:p>
      <text:p text:style-name="P63"/>
      <text:p text:style-name="P47"># print(outra_variavel)</text:p>
      <text:p text:style-name="P64">resposta:</text:p>
      <text:p text:style-name="P64"><text:soft-page-break/></text:p>
      <text:p text:style-name="P64">100ABC</text:p>
      <text:p text:style-name="P47"/>
      <text:p text:style-name="P47">print(string.zfill(10)) - .<text:span text:style-name="T22">zfill() é um método da string, </text:span><text:span text:style-name="T23">ele coloca o total de caracteres nesse caso com 10 caracteres</text:span><text:span text:style-name="T22">, como .upper(), .lower(), .isnumeric() etc …</text:span></text:p>
      <text:p text:style-name="P47"/>
      <text:p text:style-name="P63">resposta:</text:p>
      <text:p text:style-name="P63"/>
      <text:p text:style-name="P63">0000001000</text:p>
      <text:p text:style-name="P63"/>
      <text:p text:style-name="P63"><text:span text:style-name="T24">Estrutura de </text:span>Repeti<text:span text:style-name="T24">ção while:</text:span></text:p>
      <text:p text:style-name="P63"/>
      <text:p text:style-name="P63">while (enquanto)</text:p>
      <text:p text:style-name="P63">Executa uma ação enquanto uma condição for verdadeira</text:p>
      <text:p text:style-name="P63">Loop infinito -&gt; Quando um código não tem fim</text:p>
      <text:p text:style-name="P65"/>
      <text:p text:style-name="P65">condicao = True</text:p>
      <text:p text:style-name="P63"/>
      <text:p text:style-name="P63">while condicao:</text:p>
      <text:p text:style-name="P63"><text:s text:c="4"/>nome = input('Qual o seu nome: ')</text:p>
      <text:p text:style-name="P63"><text:s text:c="4"/>print(f'Seu nome é {nome}')</text:p>
      <text:p text:style-name="P63"/>
      <text:p text:style-name="P63"><text:s text:c="4"/>if nome == 'sair':</text:p>
      <text:p text:style-name="P63"><text:s text:c="8"/>break</text:p>
      <text:p text:style-name="P63"/>
      <text:p text:style-name="P63">print('Acabou')</text:p>
      <text:p text:style-name="P63"/>
      <text:p text:style-name="P66">Acima mostra que se não colocar o break ou um comando do tipo booleano, o código vai se manter no loop infinito.</text:p>
      <text:p text:style-name="P67"/>
      <text:p text:style-name="P68">Condição em detalhes:</text:p>
      <text:p text:style-name="P68"/>
      <text:p text:style-name="P67">contador = 0<text:line-break/><text:line-break/>while contador &lt;= 10:<text:line-break/> <text:s text:c="3"/>contador = contador + 1<text:line-break/> <text:s text:c="3"/>print(contador)<text:line-break/><text:line-break/>print('Acabou')</text:p>
      <text:p text:style-name="P67"/>
      <text:p text:style-name="P68">Fazendo um contador, e mostrando a utilização de operadores aritmético e de atribuição.</text:p>
      <text:p text:style-name="P68"/>
      <text:p text:style-name="P69">Operadores de atribuição com operadores aritméticos</text:p>
      <text:p text:style-name="P69"/>
      <text:p text:style-name="P69"><text:span text:style-name="T25">Os operadores de atribuição em Python </text:span><text:span text:style-name="T26">são usados ​​para armazenar valores em variáveis</text:span><text:span text:style-name="T25">. O operador básico é o sinal de igual (=), que atribui o valor da direita à variável da esquerda. Também existem métodos compostos que realizam uma operação matemática e atribuição simultânea.</text:span></text:p>
      <text:p text:style-name="P70"><text:line-break/><text:span text:style-name="T27">Operadores de atribuição<text:line-break/>= += -= *= /= //= **= %=</text:span></text:p>
      <text:p text:style-name="P71"><text:soft-page-break/>contador = 10<text:line-break/><text:line-break/>contador /= 5<text:line-break/>print(contador)</text:p>
      <text:p text:style-name="P71"/>
      <text:p text:style-name="P72"><text:span text:style-name="T28">Repetição While + continue – Pulando </text:span><text:span text:style-name="T29">alg</text:span><text:span text:style-name="T28">uma repetição</text:span></text:p>
      <text:p text:style-name="P72"/>
      <text:p text:style-name="P73">Utilizando continue em while você consegue ignorar algum passe que você deseja que ele não faça, e mantenha o programa funcionando perfeitamente, e como mostra abaixo ele vai mostrar os dados analisados, e os que foram ignorados não vai aparecer como mostra no exemplo abaixo: </text:p>
      <text:p text:style-name="P72"/>
      <text:p text:style-name="P72">contador = 0<text:line-break/>while contador &lt;= 100:<text:line-break/><text:tab/>contador += 1<text:line-break/><text:line-break/> <text:tab/>if contador == 6:<text:line-break/> <text:tab/><text:tab/>print('Não vou mostrar o 6.')<text:line-break/> <text:tab/><text:tab/>continue<text:line-break/><text:line-break/> <text:tab/>if contador &gt;= 10 and contador &lt;= 27:<text:line-break/> <text:tab/><text:tab/>print('Não vou mostrar o', contador)<text:line-break/> <text:tab/><text:tab/>continue<text:line-break/><text:line-break/> <text:tab/>print(contador)<text:line-break/><text:line-break/> <text:tab/>if contador == 40:<text:line-break/> <text:tab/><text:tab/>break<text:line-break/><text:line-break/><text:line-break/>print('Acabou')</text:p>
      <text:p text:style-name="P72"/>
      <text:p text:style-name="P74">Resultado:</text:p>
      <text:p text:style-name="P74"/>
      <text:p text:style-name="P74">1</text:p>
      <text:p text:style-name="P74">2</text:p>
      <text:p text:style-name="P74">3</text:p>
      <text:p text:style-name="P74">4</text:p>
      <text:p text:style-name="P74">5</text:p>
      <text:p text:style-name="P74">Não vou mostrar o 6.</text:p>
      <text:p text:style-name="P74">7</text:p>
      <text:p text:style-name="P74">8</text:p>
      <text:p text:style-name="P74">9</text:p>
      <text:p text:style-name="P74">Não vou mostrar o 10</text:p>
      <text:p text:style-name="P74">Não vou mostrar o 11</text:p>
      <text:p text:style-name="P74">Não vou mostrar o 12</text:p>
      <text:p text:style-name="P74">Não vou mostrar o 13</text:p>
      <text:p text:style-name="P74">Não vou mostrar o 14</text:p>
      <text:p text:style-name="P74">Não vou mostrar o 15</text:p>
      <text:p text:style-name="P74">Não vou mostrar o 16</text:p>
      <text:p text:style-name="P74">Não vou mostrar o 17</text:p>
      <text:p text:style-name="P74"><text:soft-page-break/>Não vou mostrar o 18</text:p>
      <text:p text:style-name="P74">Não vou mostrar o 19</text:p>
      <text:p text:style-name="P74">Não vou mostrar o 20</text:p>
      <text:p text:style-name="P74">Não vou mostrar o 21</text:p>
      <text:p text:style-name="P74">Não vou mostrar o 22</text:p>
      <text:p text:style-name="P74">Não vou mostrar o 23</text:p>
      <text:p text:style-name="P74">Não vou mostrar o 24</text:p>
      <text:p text:style-name="P74">Não vou mostrar o 25</text:p>
      <text:p text:style-name="P74">Não vou mostrar o 26</text:p>
      <text:p text:style-name="P74">Não vou mostrar o 27</text:p>
      <text:p text:style-name="P74">28</text:p>
      <text:p text:style-name="P74">29</text:p>
      <text:p text:style-name="P74">30</text:p>
      <text:p text:style-name="P74">31</text:p>
      <text:p text:style-name="P74">32</text:p>
      <text:p text:style-name="P74">33</text:p>
      <text:p text:style-name="P74">34</text:p>
      <text:p text:style-name="P74">35</text:p>
      <text:p text:style-name="P74">36</text:p>
      <text:p text:style-name="P74">37</text:p>
      <text:p text:style-name="P74">38</text:p>
      <text:p text:style-name="P74">39</text:p>
      <text:p text:style-name="P74">40</text:p>
      <text:p text:style-name="P74">Acabou</text:p>
      <text:p text:style-name="P74"/>
      <text:p text:style-name="P75">while + while (Laços internos)</text:p>
      <text:p text:style-name="P75"/>
      <text:p text:style-name="P76">Abaixo está mostrando uma tabela mostrando a linha e a coluna dessa tabela, utilizando while aninhados:</text:p>
      <text:p text:style-name="P75"/>
      <text:p text:style-name="P75">td_linhas = 5<text:line-break/>qtd_colunas = 5<text:line-break/><text:line-break/>linha = 1<text:line-break/>while linha &lt;= qtd_linhas:<text:line-break/> coluna = 1<text:line-break/> while coluna &lt;= qtd_colunas:<text:line-break/> print(f'{linha=} {coluna=}')<text:line-break/> coluna += 1<text:line-break/> linha += 1<text:line-break/><text:line-break/>print('Acabou')</text:p>
      <text:p text:style-name="P75"/>
      <text:p text:style-name="P76">Resultado:</text:p>
      <text:p text:style-name="P76"/>
      <text:p text:style-name="P76">linha=1 coluna=1</text:p>
      <text:p text:style-name="P76">linha=1 coluna=2</text:p>
      <text:p text:style-name="P76">linha=1 coluna=3</text:p>
      <text:p text:style-name="P76">linha=1 coluna=4</text:p>
      <text:p text:style-name="P76">linha=1 coluna=5</text:p>
      <text:p text:style-name="P76">linha=2 coluna=1</text:p>
      <text:p text:style-name="P76"><text:soft-page-break/>linha=2 coluna=2</text:p>
      <text:p text:style-name="P76">linha=2 coluna=3</text:p>
      <text:p text:style-name="P76">linha=2 coluna=4</text:p>
      <text:p text:style-name="P76">linha=2 coluna=5</text:p>
      <text:p text:style-name="P76">linha=3 coluna=1</text:p>
      <text:p text:style-name="P76">linha=3 coluna=2</text:p>
      <text:p text:style-name="P76">linha=3 coluna=3</text:p>
      <text:p text:style-name="P76">linha=3 coluna=4</text:p>
      <text:p text:style-name="P76">linha=3 coluna=5</text:p>
      <text:p text:style-name="P76">linha=4 coluna=1</text:p>
      <text:p text:style-name="P76">linha=4 coluna=2</text:p>
      <text:p text:style-name="P76">linha=4 coluna=3</text:p>
      <text:p text:style-name="P76">linha=4 coluna=4</text:p>
      <text:p text:style-name="P76">linha=4 coluna=5</text:p>
      <text:p text:style-name="P76">linha=5 coluna=1</text:p>
      <text:p text:style-name="P76">linha=5 coluna=2</text:p>
      <text:p text:style-name="P76">linha=5 coluna=3</text:p>
      <text:p text:style-name="P76">linha=5 coluna=4</text:p>
      <text:p text:style-name="P76">linha=5 coluna=5</text:p>
      <text:p text:style-name="P76">Acabou</text:p>
      <text:p text:style-name="P76"/>
      <text:p text:style-name="P77">while/else</text:p>
      <text:p text:style-name="P77"/>
      <text:p text:style-name="P78">O el<text:span text:style-name="T30">se no while serve para você mostrar alguma frase como mostra o exemplo abaixo, mas esse método dificilmente é utilizado.</text:span></text:p>
      <text:p text:style-name="P78"/>
      <text:p text:style-name="P79">string = 'Valor qualquer'</text:p>
      <text:p text:style-name="P43"/>
      <text:p text:style-name="P47">i = 0</text:p>
      <text:p text:style-name="P47">while i &lt; len(string):</text:p>
      <text:p text:style-name="P80">    <text:span text:style-name="T31">letra = string[i]</text:span></text:p>
      <text:p text:style-name="P43"/>
      <text:p text:style-name="P80">    <text:span text:style-name="T31">if letra == ' ':</text:span></text:p>
      <text:p text:style-name="P80">        <text:span text:style-name="T31">break</text:span></text:p>
      <text:p text:style-name="P43"/>
      <text:p text:style-name="P80">    <text:span text:style-name="T31">print(letra)</text:span></text:p>
      <text:p text:style-name="P80">    <text:span text:style-name="T31">i += 1</text:span></text:p>
      <text:p text:style-name="P47">else:</text:p>
      <text:p text:style-name="P80">    <text:span text:style-name="T31">print('Não encontrei um espaço na string.')</text:span></text:p>
      <text:p text:style-name="P47">print('Fora do while.')</text:p>
      <text:p text:style-name="P77"/>
      <text:p text:style-name="P81">No código acima verifica se existe algum espaço entre as palavras ou não, se não tive<text:span text:style-name="T32">r</text:span> espaço o el<text:span text:style-name="T32">se vai funcionar.</text:span></text:p>
      <text:p text:style-name="P81"/>
      <text:p text:style-name="P82">Resultado:</text:p>
      <text:p text:style-name="P82"/>
      <text:p text:style-name="P82">Com espaço:</text:p>
      <text:p text:style-name="P82"/>
      <text:p text:style-name="P82">V</text:p>
      <text:p text:style-name="P82">a</text:p>
      <text:p text:style-name="P82">l</text:p>
      <text:p text:style-name="P82"><text:soft-page-break/>o</text:p>
      <text:p text:style-name="P82">r</text:p>
      <text:p text:style-name="P82">Fora do while.</text:p>
      <text:p text:style-name="P82"/>
      <text:p text:style-name="P83">Aqui está mostrando a palavra até onde tem o espaço.</text:p>
      <text:p text:style-name="P82"/>
      <text:p text:style-name="P84">Sem espaço:</text:p>
      <text:p text:style-name="P84"/>
      <text:p text:style-name="P84">V</text:p>
      <text:p text:style-name="P84">a</text:p>
      <text:p text:style-name="P84">l</text:p>
      <text:p text:style-name="P84">o</text:p>
      <text:p text:style-name="P84">r</text:p>
      <text:p text:style-name="P84">q</text:p>
      <text:p text:style-name="P84">u</text:p>
      <text:p text:style-name="P84">a</text:p>
      <text:p text:style-name="P84">l</text:p>
      <text:p text:style-name="P84">q</text:p>
      <text:p text:style-name="P84">u</text:p>
      <text:p text:style-name="P84">e</text:p>
      <text:p text:style-name="P84">r</text:p>
      <text:p text:style-name="P84">Não encontrei um espaço na string.</text:p>
      <text:p text:style-name="P84">Fora do while.</text:p>
      <text:p text:style-name="P84"/>
      <text:p text:style-name="P83">Aqui a palavra está tudo junto e sem espaço, e mostrando a frase que está dentro do else.</text:p>
      <text:p text:style-name="P85"/>
      <text:p text:style-name="P86">Introdução ao for / in - Estrutura de repetição para coisas finitas</text:p>
      <text:p text:style-name="P87"/>
      <text:p text:style-name="P47">O for é utilizado para fazer códigos de repetição que é possível saber quantas vezes </text:p>
      <text:p text:style-name="P47">ele vai ser executado, essa estrutura de repetição tem limites definidos, diferente do while, </text:p>
      <text:p text:style-name="P47">que enquanto não colocar o comando de parada, ele continua executando.</text:p>
      <text:p text:style-name="P43"/>
      <text:p text:style-name="P47">O código abaixo mostra a iteração de strings utilizando for:</text:p>
      <text:p text:style-name="P47">"""</text:p>
      <text:p text:style-name="P43"/>
      <text:p text:style-name="P47">texto = "Python"</text:p>
      <text:p text:style-name="P43"/>
      <text:p text:style-name="P47">texto_novo = ""</text:p>
      <text:p text:style-name="P47">for letra in texto:</text:p>
      <text:p text:style-name="P80">    <text:span text:style-name="T31">texto_novo += f"*{letra}"</text:span></text:p>
      <text:p text:style-name="P80">    <text:span text:style-name="T31">print(letra)</text:span></text:p>
      <text:p text:style-name="P47">print(texto_novo + "*")</text:p>
      <text:p text:style-name="P43"/>
      <text:p text:style-name="P47">"""</text:p>
      <text:p text:style-name="P47">Resultado:</text:p>
      <text:p text:style-name="P43"/>
      <text:p text:style-name="P47">P</text:p>
      <text:p text:style-name="P47">y</text:p>
      <text:p text:style-name="P47">t</text:p>
      <text:p text:style-name="P47"><text:soft-page-break/>h</text:p>
      <text:p text:style-name="P47">o</text:p>
      <text:p text:style-name="P47">n</text:p>
      <text:p text:style-name="P47">*P*y*t*h*o*n*</text:p>
      <text:p text:style-name="P88"/>
      <text:p text:style-name="P50">Range + For para usar intervalos de números</text:p>
      <text:p text:style-name="P43"/>
      <text:p text:style-name="P47">Estrutura da função range, mostrando os parâmetros que ele recebe:</text:p>
      <text:p text:style-name="P43"/>
      <text:p text:style-name="P47">range(start, stop, step)</text:p>
      <text:p text:style-name="P43"/>
      <text:p text:style-name="P47">o Step é para propor de quantos em quantos números deseja pular.</text:p>
      <text:p text:style-name="P43"/>
      <text:p text:style-name="P47">mas ele pode receber apenas um parâmetro, por exemplo o parâmetro de stop, que vai definir</text:p>
      <text:p text:style-name="P47">a parada, e o start vira 0 e o step vira 1, veja o código abaixo: </text:p>
      <text:p text:style-name="P43"/>
      <text:p text:style-name="P47">for n in range(10):</text:p>
      <text:p text:style-name="P80">    <text:span text:style-name="T31">print(n)</text:span></text:p>
      <text:p text:style-name="P42"/>
      <text:p text:style-name="P47">Resultado:</text:p>
      <text:p text:style-name="P43"/>
      <text:p text:style-name="P47">0</text:p>
      <text:p text:style-name="P47">1</text:p>
      <text:p text:style-name="P47">2</text:p>
      <text:p text:style-name="P47">3</text:p>
      <text:p text:style-name="P47">4</text:p>
      <text:p text:style-name="P47">5</text:p>
      <text:p text:style-name="P47">6</text:p>
      <text:p text:style-name="P47">7</text:p>
      <text:p text:style-name="P47">8</text:p>
      <text:p text:style-name="P47">9</text:p>
      <text:p text:style-name="P43"/>
      <text:p text:style-name="P47">for n in range(0, 10, 1):</text:p>
      <text:p text:style-name="P80">    <text:span text:style-name="T31">print(n)</text:span></text:p>
      <text:p text:style-name="P42"/>
      <text:p text:style-name="P47">Range utilizando os três parâmetro vai agir do mesmo jeito que </text:p>
      <text:p text:style-name="P47">o primeiro exemplo.</text:p>
      <text:p text:style-name="P47"/>
      <text:p text:style-name="P47">Resultado:</text:p>
      <text:p text:style-name="P43"/>
      <text:p text:style-name="P47">0</text:p>
      <text:p text:style-name="P47">1</text:p>
      <text:p text:style-name="P47">2</text:p>
      <text:p text:style-name="P47">3</text:p>
      <text:p text:style-name="P47">4</text:p>
      <text:p text:style-name="P47">5</text:p>
      <text:p text:style-name="P47">6</text:p>
      <text:p text:style-name="P47">7</text:p>
      <text:p text:style-name="P47">8</text:p>
      <text:p text:style-name="P47">9</text:p>
      <text:p text:style-name="P47"><text:soft-page-break/></text:p>
      <text:p text:style-name="P47">for n in range(0, -10, -1):</text:p>
      <text:p text:style-name="P80">    <text:span text:style-name="T31">print(n)</text:span></text:p>
      <text:p text:style-name="P47"/>
      <text:p text:style-name="P47">utilizando range para contar números de traz para frente</text:p>
      <text:p text:style-name="P43"/>
      <text:p text:style-name="P47">Resultado:</text:p>
      <text:p text:style-name="P43"/>
      <text:p text:style-name="P47">0</text:p>
      <text:p text:style-name="P47">-1</text:p>
      <text:p text:style-name="P47">-2</text:p>
      <text:p text:style-name="P47">-3</text:p>
      <text:p text:style-name="P47">-4</text:p>
      <text:p text:style-name="P47">-5</text:p>
      <text:p text:style-name="P47">-6</text:p>
      <text:p text:style-name="P47">-7</text:p>
      <text:p text:style-name="P47">-8</text:p>
      <text:p text:style-name="P47">-9</text:p>
      <text:p text:style-name="P47"/>
      <text:p text:style-name="P47">for n in range(0, 10, 2):</text:p>
      <text:p text:style-name="P80">    <text:span text:style-name="T31">print(n)</text:span></text:p>
      <text:p text:style-name="P42"/>
      <text:p text:style-name="P47">range iterando a contagem de 2 em 2 com o step.</text:p>
      <text:p text:style-name="P47">resultado:</text:p>
      <text:p text:style-name="P43"/>
      <text:p text:style-name="P47">0</text:p>
      <text:p text:style-name="P47">2</text:p>
      <text:p text:style-name="P47">4</text:p>
      <text:p text:style-name="P47">6</text:p>
      <text:p text:style-name="P47">8</text:p>
      <text:p text:style-name="P47"/>
      <text:p text:style-name="P50">Como o for funciona por debaixo dos panos: </text:p>
      <text:p text:style-name="P47"/>
      <text:p text:style-name="P47">(next, iter, iterável, iterador)</text:p>
      <text:p text:style-name="P43"/>
      <text:p text:style-name="P47">next - me entregue o proxímo valor</text:p>
      <text:p text:style-name="P47">iter - me entregue o seu iterador</text:p>
      <text:p text:style-name="P47">iterável - str, range, etc...</text:p>
      <text:p text:style-name="P47">iterador - quem sabe entregar um valor por vez</text:p>
      <text:p text:style-name="P47"/>
      <text:p text:style-name="P47">texto = iter("David") #.__iter__() função iter() faz a mesma coisa que o método __iter__()</text:p>
      <text:p text:style-name="P47"># aqui ele vai guardar os iteráveis que são as strings, mas ele vai mostrar somente o endereço</text:p>
      <text:p text:style-name="P47"># do objeto.</text:p>
      <text:p text:style-name="P47">print(texto)</text:p>
      <text:p text:style-name="P47"/>
      <text:p text:style-name="P47">resultado:</text:p>
      <text:p text:style-name="P43"/>
      <text:p text:style-name="P47">&lt;str_ascii_iterator object at 0x785d979e26b0&gt;</text:p>
      <text:p text:style-name="P47"/>
      <text:p text:style-name="P47"># Para mostrar a iteração item por item é necessário chamar o método ou função next.</text:p>
      <text:p text:style-name="P43"><text:soft-page-break/></text:p>
      <text:p text:style-name="P47">print(texto.__next__())</text:p>
      <text:p text:style-name="P47">print(texto.__next__())</text:p>
      <text:p text:style-name="P47">print(texto.__next__())</text:p>
      <text:p text:style-name="P47">print(texto.__next__())</text:p>
      <text:p text:style-name="P47">print(texto.__next__())</text:p>
      <text:p text:style-name="P43"/>
      <text:p text:style-name="P47"># print(texto.__next__()) se chamar esse ultimo print como o nome tem 5 letras ela vai iterar 5 vezes,</text:p>
      <text:p text:style-name="P47"># se chamar novamente e não existir nada a mostrar vai gerar o erro StopIteration.</text:p>
      <text:p text:style-name="P43"/>
      <text:p text:style-name="P47"># E pode ser usado a função do next também:</text:p>
      <text:p text:style-name="P47">texto = iter("David")</text:p>
      <text:p text:style-name="P43"/>
      <text:p text:style-name="P47">print(next(texto))</text:p>
      <text:p text:style-name="P47">print(next(texto))</text:p>
      <text:p text:style-name="P47">print(next(texto))</text:p>
      <text:p text:style-name="P47">print(next(texto))</text:p>
      <text:p text:style-name="P47">print(next(texto))</text:p>
      <text:p text:style-name="P42"/>
      <text:p text:style-name="P47">resltado de ambos:</text:p>
      <text:p text:style-name="P43"/>
      <text:p text:style-name="P47">D</text:p>
      <text:p text:style-name="P47">a</text:p>
      <text:p text:style-name="P47">v</text:p>
      <text:p text:style-name="P47">i</text:p>
      <text:p text:style-name="P47">d</text:p>
      <text:p text:style-name="P42"/>
      <text:p text:style-name="P47">texto = "Luiz" # Iterável</text:p>
      <text:p text:style-name="P47">iterador = iter(texto) # Iterator</text:p>
      <text:p text:style-name="P43"/>
      <text:p text:style-name="P47"># Por debaixo dos panos praticamente é isso que o for faz:</text:p>
      <text:p text:style-name="P47">while True:</text:p>
      <text:p text:style-name="P80">    <text:span text:style-name="T31">try:</text:span></text:p>
      <text:p text:style-name="P80">        <text:span text:style-name="T31">letra = next(iterador)</text:span></text:p>
      <text:p text:style-name="P80">        <text:span text:style-name="T31">print(letra)</text:span></text:p>
      <text:p text:style-name="P80">    <text:span text:style-name="T31">except StopIteration:</text:span></text:p>
      <text:p text:style-name="P80">        <text:span text:style-name="T31">break</text:span></text:p>
      <text:p text:style-name="P47"/>
      <text:p text:style-name="P47">resposta:</text:p>
      <text:p text:style-name="P43"/>
      <text:p text:style-name="P47">L</text:p>
      <text:p text:style-name="P47">u</text:p>
      <text:p text:style-name="P47">i</text:p>
      <text:p text:style-name="P47">z</text:p>
      <text:p text:style-name="P42"/>
      <text:p text:style-name="P47"># Fazendo o for o procedimento fica simples:</text:p>
      <text:p text:style-name="P43"/>
      <text:p text:style-name="P47">for letra in texto:</text:p>
      <text:p text:style-name="P80">    <text:span text:style-name="T31">print(letra)</text:span></text:p>
      <text:p text:style-name="P47"/>
      <text:p text:style-name="P47"><text:soft-page-break/>Resultado:</text:p>
      <text:p text:style-name="P43"/>
      <text:p text:style-name="P47">L</text:p>
      <text:p text:style-name="P47">u</text:p>
      <text:p text:style-name="P47">i</text:p>
      <text:p text:style-name="P47">z</text:p>
      <text:p text:style-name="P42"/>
      <text:p text:style-name="P50">O que aprendemos com o while também funciona no for(continue, break, else, etc)</text:p>
      <text:p text:style-name="P43"/>
      <text:p text:style-name="P47">for i in range(10):</text:p>
      <text:p text:style-name="P80">    <text:span text:style-name="T31">if i == 2:</text:span></text:p>
      <text:p text:style-name="P80">        <text:span text:style-name="T31">print("i é 2, pulando...")</text:span></text:p>
      <text:p text:style-name="P80">        <text:span text:style-name="T31">continue</text:span></text:p>
      <text:p text:style-name="P43"/>
      <text:p text:style-name="P80">    <text:span text:style-name="T31">if i == 8:</text:span></text:p>
      <text:p text:style-name="P80">        <text:span text:style-name="T31">print("i é 8, seu else não executará")</text:span></text:p>
      <text:p text:style-name="P80">        <text:span text:style-name="T31">break</text:span></text:p>
      <text:p text:style-name="P43"/>
      <text:p text:style-name="P80">    <text:span text:style-name="T31">for j in range(1, 3):</text:span></text:p>
      <text:p text:style-name="P80">        <text:span text:style-name="T31">print(i, j)</text:span></text:p>
      <text:p text:style-name="P43"/>
      <text:p text:style-name="P47">else:</text:p>
      <text:p text:style-name="P80">    <text:span text:style-name="T31">print("For completo com sucesso!")</text:span></text:p>
      <text:p text:style-name="P42"/>
      <text:p text:style-name="P47">resultado:</text:p>
      <text:p text:style-name="P43"/>
      <text:p text:style-name="P47">0 1</text:p>
      <text:p text:style-name="P47">0 2</text:p>
      <text:p text:style-name="P47">1 1</text:p>
      <text:p text:style-name="P47">1 2</text:p>
      <text:p text:style-name="P47">i é 2, pulando...</text:p>
      <text:p text:style-name="P47">3 1</text:p>
      <text:p text:style-name="P47">3 2</text:p>
      <text:p text:style-name="P47">4 1</text:p>
      <text:p text:style-name="P47">4 2</text:p>
      <text:p text:style-name="P47">5 1</text:p>
      <text:p text:style-name="P47">5 2</text:p>
      <text:p text:style-name="P47">6 1</text:p>
      <text:p text:style-name="P47">6 2</text:p>
      <text:p text:style-name="P47">7 1</text:p>
      <text:p text:style-name="P47">7 2</text:p>
      <text:p text:style-name="P47">i é 8, seu else não </text:p>
      <text:p text:style-name="P47"/>
      <text:p text:style-name="P89">"""</text:p>
      <text:p text:style-name="P89">Introdução sobre as listas mutáveis em Python</text:p>
      <text:p text:style-name="P90"/>
      <text:p text:style-name="P89">Listas  em Python</text:p>
      <text:p text:style-name="P90"/>
      <text:p text:style-name="P89">Tipo list - Mutável</text:p>
      <text:p text:style-name="P90"/>
      <text:p text:style-name="P89">Suporta vários valores de qualquer tipo</text:p>
      <text:p text:style-name="P89"><text:soft-page-break/>Conhecimentos reutilizáveis - indices e fatiamento</text:p>
      <text:p text:style-name="P89">Métodos úteis: append, insert, pop, del, clear, extend, +</text:p>
      <text:p text:style-name="P89">"""</text:p>
      <text:p text:style-name="P90"/>
      <text:p text:style-name="P89"># ......+01234 indices positivos </text:p>
      <text:p text:style-name="P89"># ......-54231 indices negativos</text:p>
      <text:p text:style-name="P90"/>
      <text:p text:style-name="P89">string = "abcde" # 5 caracteres (len)</text:p>
      <text:p text:style-name="P90"/>
      <text:p text:style-name="P89"># Strings são sequências indexadas de caracteres, o que permite acessar cada </text:p>
      <text:p text:style-name="P89"># caractere por seu índice. No entanto, elas são imutáveis e não podem ser modificadas.</text:p>
      <text:p text:style-name="P90"/>
      <text:p text:style-name="P89"># Lista é do tipo mutável - a lista pode ser modificada</text:p>
      <text:p text:style-name="P90"/>
      <text:p text:style-name="P89"># String - sequência imutável de caracteres.</text:p>
      <text:p text:style-name="P89"># Lista - sequência mutável de elementos.</text:p>
      <text:p text:style-name="P90"/>
      <text:p text:style-name="P89"># Listas são mutáveis, ou seja, podem ser modificadas.</text:p>
      <text:p text:style-name="P89"># É possível acessar cada elemento da lista por meio de índices.</text:p>
      <text:p text:style-name="P89"># Cada índice representa a posição de um elemento na lista.</text:p>
      <text:p text:style-name="P89"># Cada elemento da lista pode ser modificada, veja o exemplo abaixo:</text:p>
      <text:p text:style-name="P90"/>
      <text:p text:style-name="P89">lista = [123, True, "Luiz Otávio", 1.2, []]</text:p>
      <text:p text:style-name="P89">print(lista)</text:p>
      <text:p text:style-name="P89">lista[-3] = "Maria"</text:p>
      <text:p text:style-name="P89">print(lista)</text:p>
      <text:p text:style-name="P90"/>
      <text:p text:style-name="P89">"""</text:p>
      <text:p text:style-name="P89">Resultado:</text:p>
      <text:p text:style-name="P90"/>
      <text:p text:style-name="P89">[123, True, 'Luiz Otávio', 1.2, []]</text:p>
      <text:p text:style-name="P89">[123, True, 'Maria', 1.2, []]</text:p>
      <text:p text:style-name="P89">"""</text:p>
      <text:p text:style-name="P89"># Checando o tipo de um valor em uma lista.</text:p>
      <text:p text:style-name="P90"/>
      <text:p text:style-name="P89">print(lista[2], type(lista[2]))</text:p>
      <text:p text:style-name="P90"/>
      <text:p text:style-name="P89">"""</text:p>
      <text:p text:style-name="P89">Resultado</text:p>
      <text:p text:style-name="P90"/>
      <text:p text:style-name="P89">Maria &lt;class 'str'&gt;</text:p>
      <text:p text:style-name="P90"/>
      <text:p text:style-name="P89">"""</text:p>
      <text:p text:style-name="P91">"""</text:p>
      <text:p text:style-name="P89">Métodos úteis:</text:p>
      <text:p text:style-name="P90"/>
      <text:p text:style-name="P89">append, insert, pop, del, clear, extend, +</text:p>
      <text:p text:style-name="P90"/>
      <text:p text:style-name="P89">Create Read Update Delete</text:p>
      <text:p text:style-name="P89">Criar, Ler, Alterar, Apagar = lista[i] (CRUD)</text:p>
      <text:p text:style-name="P89">"""</text:p>
      <text:p text:style-name="P89"><text:soft-page-break/>lista = [10, 20, 30, 40]</text:p>
      <text:p text:style-name="P89"># pegando um valor</text:p>
      <text:p text:style-name="P89">numero = lista[2]</text:p>
      <text:p text:style-name="P89">print(numero)</text:p>
      <text:p text:style-name="P89"># Modificando elemento da lista</text:p>
      <text:p text:style-name="P89">lista[2] = 300</text:p>
      <text:p text:style-name="P89">print(lista)</text:p>
      <text:p text:style-name="P89"># Deletando elemento especifico da lista</text:p>
      <text:p text:style-name="P89">del lista[2]</text:p>
      <text:p text:style-name="P89">print(lista)# os indices automaticamentes serão ajustados</text:p>
      <text:p text:style-name="P89"># indice 0 - 10, 1 - 20, 2 - 40 </text:p>
      <text:p text:style-name="P89"># o 30 que estava no indice 2 foi apagado, </text:p>
      <text:p text:style-name="P89"># então o indice do elemento 40 se tornou 2, ajustando os indices conforme</text:p>
      <text:p text:style-name="P89"># os elementos dentro da lista.</text:p>
      <text:p text:style-name="P92"> </text:p>
      <text:p text:style-name="P89"># Adicionando elemento ao final da lista</text:p>
      <text:p text:style-name="P89">lista.append(50)</text:p>
      <text:p text:style-name="P89">print(lista)</text:p>
      <text:p text:style-name="P89"># Removendo o ultimo elemento</text:p>
      <text:p text:style-name="P89">lista.pop()</text:p>
      <text:p text:style-name="P89">print(lista)</text:p>
      <text:p text:style-name="P90"/>
      <text:p text:style-name="P89">"""</text:p>
      <text:p text:style-name="P89">Resultado:</text:p>
      <text:p text:style-name="P90"/>
      <text:p text:style-name="P89">30</text:p>
      <text:p text:style-name="P89">[10, 20, 300, 40]</text:p>
      <text:p text:style-name="P89">[10, 20, 40]</text:p>
      <text:p text:style-name="P89">[10, 20, 40, 50]</text:p>
      <text:p text:style-name="P89">[10, 20, 40]</text:p>
      <text:p text:style-name="P89">"""</text:p>
      <text:p text:style-name="P93">"""</text:p>
      <text:p text:style-name="P89">Inserindo itens da lista em qualquer indice da lista</text:p>
      <text:p text:style-name="P89">com insert</text:p>
      <text:p text:style-name="P89">"""</text:p>
      <text:p text:style-name="P89">lista = [10, 20, 30, 40]</text:p>
      <text:p text:style-name="P90"/>
      <text:p text:style-name="P89"># Adicionando item na lista</text:p>
      <text:p text:style-name="P89">lista.insert(0, 5) # insert(indice, valor)</text:p>
      <text:p text:style-name="P89">print(lista)</text:p>
      <text:p text:style-name="P90"/>
      <text:p text:style-name="P89"># Limpando a lista</text:p>
      <text:p text:style-name="P89">lista.clear()</text:p>
      <text:p text:style-name="P89">print(lista)</text:p>
      <text:p text:style-name="P90"/>
      <text:p text:style-name="P89"># Resultado</text:p>
      <text:p text:style-name="P90"/>
      <text:p text:style-name="P89"># [5, 10, 20, 30, 40]</text:p>
      <text:p text:style-name="P89"># []</text:p>
      <text:p text:style-name="P94"/>
      <text:p text:style-name="P9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19:21:39.643171513</meta:creation-date>
    <dc:date>2026-07-12T22:09:24.411900000</dc:date>
    <meta:editing-duration>PT16H9M53S</meta:editing-duration>
    <meta:editing-cycles>97</meta:editing-cycles>
    <meta:generator>LibreOffice/26.2.4.2$Windows_X86_64 LibreOffice_project/0229ac93fcf0d7cbc6376066c6f35021cef002dc</meta:generator>
    <meta:document-statistic meta:table-count="0" meta:image-count="0" meta:object-count="0" meta:page-count="22" meta:paragraph-count="778" meta:word-count="3625" meta:character-count="20996" meta:non-whitespace-character-count="17874"/>
  </office:meta>
</office:document-meta>
</file>