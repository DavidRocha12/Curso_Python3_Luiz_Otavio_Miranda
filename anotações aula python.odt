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18c" officeooo:paragraph-rsid="001fd18c"/>
    </style:style>
    <style:style style:name="P2" style:family="paragraph" style:parent-style-name="Standard">
      <style:text-properties fo:font-weight="bold" officeooo:rsid="0021ce5c" officeooo:paragraph-rsid="0021ce5c" style:font-weight-asian="bold" style:font-weight-complex="bold"/>
    </style:style>
    <style:style style:name="P3" style:family="paragraph" style:parent-style-name="Standard">
      <style:text-properties officeooo:rsid="00268687" officeooo:paragraph-rsid="00268687"/>
    </style:style>
    <style:style style:name="P4" style:family="paragraph" style:parent-style-name="Standard">
      <style:text-properties officeooo:rsid="0021ce5c" officeooo:paragraph-rsid="0021ce5c"/>
    </style:style>
    <style:style style:name="P5" style:family="paragraph" style:parent-style-name="Standard">
      <style:text-properties officeooo:rsid="00244454" officeooo:paragraph-rsid="00244454"/>
    </style:style>
    <style:style style:name="P6" style:family="paragraph" style:parent-style-name="Standard">
      <style:text-properties officeooo:rsid="002bcf9f" officeooo:paragraph-rsid="002bcf9f"/>
    </style:style>
    <style:style style:name="P7" style:family="paragraph" style:parent-style-name="Standard">
      <style:text-properties officeooo:rsid="00268687" officeooo:paragraph-rsid="002b1bd2"/>
    </style:style>
    <style:style style:name="P8" style:family="paragraph" style:parent-style-name="Text_20_body">
      <style:text-properties officeooo:rsid="00268687" officeooo:paragraph-rsid="0026868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normal" officeooo:paragraph-rsid="002b1bd2" style:text-blinking="false" style:font-size-asian="12pt" style:font-size-complex="1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b1bd2"/>
    </style:style>
    <style:style style:name="P13" style:family="paragraph" style:parent-style-name="Standard">
      <style:text-properties officeooo:rsid="00271655" officeooo:paragraph-rsid="00271655"/>
    </style:style>
    <style:style style:name="P14" style:family="paragraph" style:parent-style-name="Standard">
      <style:text-properties officeooo:rsid="0027ff6d" officeooo:paragraph-rsid="0027ff6d"/>
    </style:style>
    <style:style style:name="P15" style:family="paragraph" style:parent-style-name="Standard">
      <style:text-properties officeooo:rsid="002524c3" officeooo:paragraph-rsid="002524c3"/>
    </style:style>
    <style:style style:name="P16" style:family="paragraph" style:parent-style-name="Standard">
      <style:text-properties officeooo:rsid="002eacc8" officeooo:paragraph-rsid="002eacc8"/>
    </style:style>
    <style:style style:name="P17" style:family="paragraph" style:parent-style-name="Standard">
      <style:text-properties fo:font-weight="bold" officeooo:rsid="002f5281" officeooo:paragraph-rsid="002f5281" style:font-weight-asian="bold" style:font-weight-complex="bold"/>
    </style:style>
    <style:style style:name="P18" style:family="paragraph" style:parent-style-name="Standard">
      <style:text-properties officeooo:rsid="002f5281" officeooo:paragraph-rsid="002f5281"/>
    </style:style>
    <style:style style:name="P19" style:family="paragraph" style:parent-style-name="Standard">
      <style:text-properties fo:font-weight="bold" officeooo:rsid="0031d141" officeooo:paragraph-rsid="0031d141" style:font-weight-asian="bold" style:font-weight-complex="bold"/>
    </style:style>
    <style:style style:name="P20" style:family="paragraph" style:parent-style-name="Standard">
      <style:text-properties fo:font-weight="bold" officeooo:rsid="00341194" officeooo:paragraph-rsid="00341194" style:font-weight-asian="bold" style:font-weight-complex="bold"/>
    </style:style>
    <style:style style:name="P21" style:family="paragraph" style:parent-style-name="Standard">
      <style:text-properties officeooo:rsid="00341194" officeooo:paragraph-rsid="00341194"/>
    </style:style>
    <style:style style:name="P22" style:family="paragraph" style:parent-style-name="Standard">
      <style:text-properties officeooo:rsid="00346522" officeooo:paragraph-rsid="00346522"/>
    </style:style>
    <style:style style:name="P23" style:family="paragraph" style:parent-style-name="Standard">
      <style:text-properties fo:color="#000000" loext:opacity="100%" officeooo:rsid="00341194" officeooo:paragraph-rsid="00341194" fo:background-color="#ffffff"/>
    </style:style>
    <style:style style:name="P24" style:family="paragraph" style:parent-style-name="Standard">
      <style:text-properties fo:color="#000000" loext:opacity="100%" style:font-name="Droid Sans Mono" fo:font-size="10.5pt" fo:font-weight="normal" officeooo:rsid="00341194" officeooo:paragraph-rsid="00341194" fo:background-color="#ffffff"/>
    </style:style>
    <style:style style:name="P25" style:family="paragraph" style:parent-style-name="Standard">
      <style:text-properties fo:font-weight="bold" officeooo:rsid="00362611" officeooo:paragraph-rsid="00362611" style:font-weight-asian="bold" style:font-weight-complex="bold"/>
    </style:style>
    <style:style style:name="P26" style:family="paragraph" style:parent-style-name="Standard">
      <style:text-properties officeooo:rsid="00362611" officeooo:paragraph-rsid="00362611"/>
    </style:style>
    <style:style style:name="P27" style:family="paragraph" style:parent-style-name="Standard">
      <style:text-properties officeooo:rsid="0037f7d4" officeooo:paragraph-rsid="0037f7d4"/>
    </style:style>
    <style:style style:name="P28" style:family="paragraph" style:parent-style-name="Standard">
      <style:text-properties officeooo:rsid="00399b20" officeooo:paragraph-rsid="00399b20"/>
    </style:style>
    <style:style style:name="P29" style:family="paragraph" style:parent-style-name="Standard">
      <style:text-properties fo:font-weight="bold" officeooo:rsid="003c113f" officeooo:paragraph-rsid="003c113f" style:font-weight-asian="bold" style:font-weight-complex="bold"/>
    </style:style>
    <style:style style:name="P30" style:family="paragraph" style:parent-style-name="Standard">
      <style:text-properties officeooo:rsid="003c113f" officeooo:paragraph-rsid="003c113f"/>
    </style:style>
    <style:style style:name="P31" style:family="paragraph" style:parent-style-name="Standard">
      <style:text-properties officeooo:rsid="00399b20" officeooo:paragraph-rsid="003c113f"/>
    </style:style>
    <style:style style:name="P32" style:family="paragraph" style:parent-style-name="Standard">
      <style:text-properties officeooo:rsid="003c8e24" officeooo:paragraph-rsid="003c8e24"/>
    </style:style>
    <style:style style:name="P33" style:family="paragraph" style:parent-style-name="Standard">
      <style:text-properties fo:font-weight="bold" officeooo:rsid="003e4ea0" officeooo:paragraph-rsid="003e4ea0" style:font-weight-asian="bold" style:font-weight-complex="bold"/>
    </style:style>
    <style:style style:name="P34" style:family="paragraph" style:parent-style-name="Standard">
      <style:text-properties officeooo:rsid="003e4ea0" officeooo:paragraph-rsid="003e4ea0"/>
    </style:style>
    <style:style style:name="P35" style:family="paragraph" style:parent-style-name="Standard">
      <style:text-properties officeooo:rsid="003fb1b1" officeooo:paragraph-rsid="003fb1b1"/>
    </style:style>
    <style:style style:name="P36" style:family="paragraph" style:parent-style-name="Standard">
      <style:text-properties fo:font-weight="bold" officeooo:rsid="00401dc5" officeooo:paragraph-rsid="00401dc5" style:font-weight-asian="bold" style:font-weight-complex="bold"/>
    </style:style>
    <style:style style:name="P37" style:family="paragraph" style:parent-style-name="Standard">
      <style:text-properties officeooo:rsid="00401dc5" officeooo:paragraph-rsid="00401dc5"/>
    </style:style>
    <style:style style:name="P38" style:family="paragraph" style:parent-style-name="Standard">
      <style:text-properties officeooo:rsid="00407851" officeooo:paragraph-rsid="00407851"/>
    </style:style>
    <style:style style:name="P39" style:family="paragraph" style:parent-style-name="Standard">
      <style:text-properties style:font-name="Arial" fo:font-size="12pt" officeooo:rsid="0041fe32" officeooo:paragraph-rsid="0041fe32" style:font-size-asian="12pt" style:font-size-complex="12pt"/>
    </style:style>
    <style:style style:name="P40" style:family="paragraph" style:parent-style-name="Standard">
      <style:text-properties fo:color="#000000" loext:opacity="100%" style:font-name="Arial" fo:font-size="12pt" officeooo:rsid="0041fe32" officeooo:paragraph-rsid="0041fe32" fo:background-color="#ffffff" style:font-size-asian="12pt" style:font-size-complex="12pt"/>
    </style:style>
    <style:style style:name="P41" style:family="paragraph" style:parent-style-name="Standard">
      <style:text-properties fo:color="#000000" loext:opacity="100%" style:font-name="Arial" fo:font-size="12pt" fo:font-weight="normal" officeooo:rsid="0041fe32" officeooo:paragraph-rsid="0041fe32" fo:background-color="#ffffff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3" style:family="paragraph" style:parent-style-name="Standard">
      <style:paragraph-properties style:line-height-at-least="0.503cm"/>
      <style:text-properties fo:color="#000000" loext:opacity="100%" style:font-name="Arial" fo:font-size="12pt" fo:background-color="#ffffff" style:font-size-asian="12pt" style:font-size-complex="12pt"/>
    </style:style>
    <style:style style:name="P44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4288de" officeooo:paragraph-rsid="004288de" fo:background-color="#ffffff" style:font-size-asian="12pt" style:font-size-complex="12pt"/>
    </style:style>
    <style:style style:name="P45" style:family="paragraph" style:parent-style-name="Standard">
      <style:text-properties fo:color="#000000" loext:opacity="100%" style:font-name="Arial" fo:font-size="12pt" officeooo:rsid="0044ae83" officeooo:paragraph-rsid="0044ae83" fo:background-color="#ffffff" style:font-size-asian="12pt" style:font-size-complex="12pt"/>
    </style:style>
    <style:style style:name="P46" style:family="paragraph" style:parent-style-name="Standard">
      <style:text-properties fo:color="#000000" loext:opacity="100%" style:font-name="Arial" fo:font-size="12pt" fo:font-weight="normal" officeooo:rsid="0044ae83" officeooo:paragraph-rsid="0044ae83" fo:background-color="#ffffff" style:font-size-asian="12pt" style:font-size-complex="12pt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4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fo:font-weight="bold" officeooo:rsid="0044ae83" fo:background-color="#fffff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503cm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4f4fd6" fo:background-color="#fffff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4f4fd6" fo:background-color="#ffffff" style:font-size-asian="12pt" style:font-size-complex="12pt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4f4fd6" fo:background-color="#ffffff" style:font-size-asian="12pt" style:font-size-complex="12pt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505276" fo:background-color="#fffff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505276" fo:background-color="#ffffff" style:font-size-asian="12pt" style:font-size-complex="12pt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531484" officeooo:paragraph-rsid="00531484" fo:background-color="#ffffff" style:font-size-asian="12pt" style:font-size-complex="12pt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505276" fo:background-color="#ffffff" style:font-size-asian="12pt" style:font-size-complex="12pt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584899" officeooo:paragraph-rsid="00584899" fo:background-color="#ffffff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dad6da" loext:opacity="100%" style:font-name="Arial" fo:font-size="12pt" fo:font-weight="normal" fo:background-color="#161526" style:font-size-asian="12pt" style:font-size-complex="12pt"/>
    </style:style>
    <style:style style:name="P62" style:family="paragraph" style:parent-style-name="Standard">
      <style:paragraph-properties style:line-height-at-least="0.503cm"/>
      <style:text-properties style:font-name="Arial" fo:font-size="12pt" style:font-size-asian="12pt" style:font-size-complex="12pt"/>
    </style:style>
    <style:style style:name="P63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5b1e78" officeooo:paragraph-rsid="005b1e78" fo:background-color="#ffffff" style:font-size-asian="12pt" style:font-size-complex="12pt"/>
    </style:style>
    <style:style style:name="P64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paragraph-rsid="005b1e78" fo:background-color="#ffffff" style:font-size-asian="12pt" style:font-size-complex="12pt"/>
    </style:style>
    <style:style style:name="P6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2d6c9" fo:background-color="#ffffff" style:font-size-asian="12pt" style:font-size-complex="12pt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302c0" officeooo:paragraph-rsid="006302c0" fo:background-color="#ffffff" style:font-size-asian="12pt" style:font-size-complex="12pt"/>
    </style:style>
    <style:style style:name="P6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4b8bb" fo:background-color="#ffffff" style:font-size-asian="12pt" style:font-size-complex="12pt"/>
    </style:style>
    <style:style style:name="P6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836" officeooo:paragraph-rsid="0066d836" fo:background-color="#ffffff" style:font-size-asian="12pt" style:font-size-complex="12pt"/>
    </style:style>
    <style:style style:name="P6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62d6c9" fo:background-color="#ffffff" style:font-size-asian="12pt" style:font-size-complex="12pt"/>
    </style:style>
    <style:style style:name="P7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c46" officeooo:paragraph-rsid="0066dc46" fo:background-color="#ffffff" style:font-size-asian="12pt" style:font-size-complex="12pt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2d6c9" fo:background-color="#ffffff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6dc46" fo:background-color="#ffffff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6dc46" fo:background-color="#fffff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a36f8" fo:background-color="#fffff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7188e5" officeooo:paragraph-rsid="007188e5" fo:background-color="#ffffff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ee07f" officeooo:paragraph-rsid="006ee07f" fo:background-color="#ffffff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da21b" officeooo:paragraph-rsid="006da21b" fo:background-color="#ffffff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e6d45" officeooo:paragraph-rsid="006e6d45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6e6d45" officeooo:paragraph-rsid="006e6d45" fo:background-color="#fffff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3dafd" officeooo:paragraph-rsid="0073dafd" fo:background-color="#ffffff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73dafd" fo:background-color="#ffffff" style:font-size-asian="12pt" style:font-size-complex="12pt"/>
    </style:style>
    <style:style style:name="P8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background-color="#ffffff" style:font-size-asian="12pt" style:font-size-complex="12pt"/>
    </style:style>
    <style:style style:name="P8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581a2" officeooo:paragraph-rsid="007581a2" fo:background-color="#fffff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977c" officeooo:paragraph-rsid="0076977c" fo:background-color="#fffff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70a7d" officeooo:paragraph-rsid="00770a7d" fo:background-color="#fffff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cfd1" officeooo:paragraph-rsid="0076cfd1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Consolas" fo:font-size="10.5pt" fo:letter-spacing="normal" fo:font-style="normal" fo:font-weight="normal" officeooo:rsid="0076cfd1" officeooo:paragraph-rsid="0076cfd1" fo:background-color="#fffff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weight="bold" fo:background-color="#ffffff" style:font-size-asian="14pt" style:font-weight-asian="bold" style:font-size-complex="14pt" style:font-weight-complex="bold"/>
    </style:style>
    <style:style style:name="P89" style:family="paragraph" style:parent-style-name="Standard">
      <style:paragraph-properties style:line-height-at-least="0.503cm"/>
      <style:text-properties fo:color="#000000" loext:opacity="100%" style:font-name="Arial" fo:font-size="14pt" fo:background-color="#ffffff" style:font-size-asian="14pt" style:font-size-complex="14pt"/>
    </style:style>
    <style:style style:name="P9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91" style:family="paragraph" style:parent-style-name="Standard">
      <style:paragraph-properties style:line-height-at-least="0.503cm"/>
      <style:text-properties fo:color="#000000" loext:opacity="100%" style:font-name="Arial" fo:font-size="12pt" fo:background-color="#ffffff" style:font-size-asian="12pt" style:font-size-complex="12pt"/>
    </style:style>
    <style:style style:name="P9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background-color="#ffffff" style:font-size-asian="12pt" style:font-size-complex="12pt"/>
    </style:style>
    <style:style style:name="P9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cfd1" fo:background-color="#ffffff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95" style:family="paragraph" style:parent-style-name="Standard">
      <style:paragraph-properties style:line-height-at-least="0.503cm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9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fo:background-color="#ffffff" style:font-size-asian="12pt" style:font-size-complex="12pt"/>
    </style:style>
    <style:style style:name="P9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7c0925" officeooo:paragraph-rsid="007c0925" fo:background-color="#fffff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b3"/>
    </style:style>
    <style:style style:name="T3" style:family="text">
      <style:text-properties officeooo:rsid="00268687"/>
    </style:style>
    <style:style style:name="T4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="0cm" loext:border="none"/>
    </style:style>
    <style:style style:name="T5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6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T7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8" style:family="text">
      <style:text-properties officeooo:rsid="0029054c"/>
    </style:style>
    <style:style style:name="T9" style:family="text">
      <style:text-properties officeooo:rsid="002d647d"/>
    </style:style>
    <style:style style:name="T10" style:family="text">
      <style:text-properties officeooo:rsid="00307bf3"/>
    </style:style>
    <style:style style:name="T11" style:family="text">
      <style:text-properties fo:color="#000000" loext:opacity="100%" fo:background-color="#ffffff" loext:char-shading-value="0"/>
    </style:style>
    <style:style style:name="T12" style:family="text">
      <style:text-properties officeooo:rsid="003a96fa"/>
    </style:style>
    <style:style style:name="T13" style:family="text">
      <style:text-properties officeooo:rsid="003c3200"/>
    </style:style>
    <style:style style:name="T14" style:family="text">
      <style:text-properties officeooo:rsid="0041fe32"/>
    </style:style>
    <style:style style:name="T15" style:family="text">
      <style:text-properties officeooo:rsid="0043855c"/>
    </style:style>
    <style:style style:name="T16" style:family="text">
      <style:text-properties fo:color="#ff79c6" loext:opacity="100%"/>
    </style:style>
    <style:style style:name="T17" style:family="text">
      <style:text-properties fo:color="#50fa7b" loext:opacity="100%"/>
    </style:style>
    <style:style style:name="T18" style:family="text">
      <style:text-properties fo:color="#f8f8f2" loext:opacity="100%"/>
    </style:style>
    <style:style style:name="T19" style:family="text">
      <style:text-properties fo:color="#8be9fd" loext:opacity="100%"/>
    </style:style>
    <style:style style:name="T20" style:family="text">
      <style:text-properties fo:color="#e9f284" loext:opacity="100%"/>
    </style:style>
    <style:style style:name="T21" style:family="text">
      <style:text-properties fo:color="#f1fa8c" loext:opacity="100%"/>
    </style:style>
    <style:style style:name="T22" style:family="text">
      <style:text-properties officeooo:rsid="005f10fc"/>
    </style:style>
    <style:style style:name="T23" style:family="text">
      <style:text-properties officeooo:rsid="005f40dd"/>
    </style:style>
    <style:style style:name="T24" style:family="text">
      <style:text-properties officeooo:rsid="00611349"/>
    </style:style>
    <style:style style:name="T25" style:family="text">
      <style:text-properties officeooo:rsid="0066a8c9"/>
    </style:style>
    <style:style style:name="T26" style:family="text">
      <style:text-properties style:text-line-through-style="none" style:text-line-through-type="none" fo:font-family="'Google Sans', Arial, sans-serif" style:text-underline-style="none" fo:font-weight="normal" style:text-blinking="false" loext:padding="0cm" loext:border="none"/>
    </style:style>
    <style:style style:name="T27" style:family="text">
      <style:text-properties style:text-line-through-style="none" style:text-line-through-type="none" fo:font-family="'Google Sans', Arial, sans-serif" style:text-underline-style="none" style:text-blinking="false" loext:padding="0cm" loext:border="non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6a36f8"/>
    </style:style>
    <style:style style:name="T30" style:family="text">
      <style:text-properties officeooo:rsid="006c08c8"/>
    </style:style>
    <style:style style:name="T31" style:family="text">
      <style:text-properties officeooo:rsid="0074553d"/>
    </style:style>
    <style:style style:name="T32" style:family="text">
      <style:text-properties fo:font-weight="normal"/>
    </style:style>
    <style:style style:name="T33" style:family="text">
      <style:text-properties officeooo:rsid="0075a83e"/>
    </style:style>
    <style:style style:name="T34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Python Otávio Miranda</text:p>
      <text:p text:style-name="P1"/>
      <text:p text:style-name="P2">Comentários em Python é Feito com #(jogo da velha, hashtag po cerquilha)</text:p>
      <text:p text:style-name="P2"/>
      <text:p text:style-name="P3">Python = Linguagem de programação</text:p>
      <text:p text:style-name="P3">Tipo de tipagem = Dinâmica / Forte</text:p>
      <text:p text:style-name="P4"/>
      <text:p text:style-name="P4"/>
      <text:p text:style-name="P4"><text:span text:style-name="T1">Docstring</text:span> é “”” duplos ou <text:s/>‘’’, <text:span text:style-name="T2">serve para criar textos que não irão mostrar na execução do programa, mas ele existe e utiliza espaço na memória em bytes, ele serve para colocar comentários maiores e que utilizam várias linhas.</text:span></text:p>
      <text:p text:style-name="P4"/>
      <text:p text:style-name="P5"><text:span text:style-name="T1">Sep=”- “ </text:span>- utilizando sep, por exemplo no print utilizando argumentos não nomeados é possíveis colocar caracteres entre essas strings ou números.<text:span text:style-name="T3"> </text:span></text:p>
      <text:p text:style-name="P3"/>
      <text:p text:style-name="P6">Escape de Strings é tudo que tenha barra invertida, por exemplo:</text:p>
      <text:p text:style-name="P6"/>
      <text:p text:style-name="P6">\n -Pula a linha</text:p>
      <text:p text:style-name="P6">\t – faz a mesma função que a tecla tab do teclado.</text:p>
      <text:p text:style-name="P6"/>
      <text:p text:style-name="P6">\” - <text:s/>adicionar aspas duplas na strings</text:p>
      <text:p text:style-name="P6">\’ - aspas simples</text:p>
      <text:p text:style-name="P6">\\ - <text:s/>uma barra invertida.</text:p>
      <text:p text:style-name="P6"/>
      <text:p text:style-name="P7"><text:span text:style-name="T4">O </text:span><text:span text:style-name="Source_20_Text"><text:span text:style-name="T5">r <text:s/>- </text:span></text:span><text:span text:style-name="T4">significa </text:span><text:span text:style-name="Strong_20_Emphasis"><text:span text:style-name="T6">Raw</text:span></text:span><text:span text:style-name="T4"> (que em inglês significa -</text:span><text:span text:style-name="Emphasis"><text:span text:style-name="T4">cru</text:span></text:span><text:span text:style-name="T4"> ou </text:span><text:span text:style-name="Emphasis"><text:span text:style-name="T4">bruto</text:span></text:span><text:span text:style-name="T4"> ). </text:span></text:p>
      <text:p text:style-name="P7"><text:span text:style-name="T4">A função dele é </text:span><text:span text:style-name="Strong_20_Emphasis"><text:span text:style-name="T6">desativar</text:span></text:span><text:span text:style-name="T4"> todos os Escapes da string.</text:span></text:p>
      <text:p text:style-name="P3"/>
      <text:p text:style-name="P3"/>
      <text:p text:style-name="P8"><text:span text:style-name="Strong_20_Emphasis"><text:span text:style-name="T6">Co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digita </text:span><text:span text:style-name="Strong_20_Emphasis"><text:span text:style-name="T6">uma</text:span></text:span><text:span text:style-name="T4"> , aparece </text:span><text:span text:style-name="Strong_20_Emphasis"><text:span text:style-name="T6">uma</text:span></text:span><text:span text:style-name="T4"> .</text:span></text:p>
      <text:p text:style-name="P9">Python</text:p>
      <text:p text:style-name="P9"/>
      <text:p text:style-name="P10"><text:span text:style-name="Source_20_Text"><text:span text:style-name="T4">print(r"C:\pasta\arquivo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10"><text:span text:style-name="Source_20_Text"><text:span text:style-name="T4"/></text:span></text:p>
      <text:p text:style-name="P11">Use o código com cautela.</text:p>
      <text:p text:style-name="P12"><text:span text:style-name="Strong_20_Emphasis"><text:span text:style-name="T4"/></text:span></text:p>
      <text:p text:style-name="P12"><text:span text:style-name="Strong_20_Emphasis"><text:span text:style-name="T6">Se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é obrigado a digitar </text:span><text:span text:style-name="Strong_20_Emphasis"><text:span text:style-name="T6">duas</text:span></text:span><text:span text:style-name="T4"> para aparecer </text:span><text:span text:style-name="Strong_20_Emphasis"><text:span text:style-name="T6">uma</text:span></text:span><text:span text:style-name="T4"> .</text:span></text:p>
      <text:p text:style-name="P11"/>
      <text:p text:style-name="P9">Python</text:p>
      <text:p text:style-name="P9"/>
      <text:p text:style-name="P10"><text:span text:style-name="Source_20_Text"><text:span text:style-name="T4">print("C:</text:span></text:span><text:a xlink:type="simple" xlink:href="file://pasta//arquivo" text:style-name="Internet_20_link" text:visited-style-name="Visited_20_Internet_20_Link"><text:span text:style-name="Source_20_Text">\\pasta\\arquivo</text:span></text:a><text:span text:style-name="Source_20_Text"><text:span text:style-name="T4">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3"/>
      <text:p text:style-name="P13">Tipos primitivos em Pytho<text:span text:style-name="T8">n</text:span> mais utilizado:</text:p>
      <text:p text:style-name="P13"/>
      <text:p text:style-name="P13">Str, int, float, bool</text:p>
      <text:p text:style-name="P13"/>
      <text:p text:style-name="P14">str – Strings</text:p>
      <text:p text:style-name="P14"><text:soft-page-break/>int – números inteiros</text:p>
      <text:p text:style-name="P14">float – números <text:span text:style-name="T9">com pontos </text:span>flutantes</text:p>
      <text:p text:style-name="P14">bool – Verdadeiro ou Falso</text:p>
      <text:p text:style-name="P14"/>
      <text:p text:style-name="P15">Type() - mostra o tipo primitivo do seu objeto.</text:p>
      <text:p text:style-name="P15"/>
      <text:p text:style-name="P16">Tipo primitivo bool(boolean)</text:p>
      <text:p text:style-name="P16">No bool existem somente duas respostas: que é True ou False(verdadeiro ou Falso)</text:p>
      <text:p text:style-name="P16"/>
      <text:p text:style-name="P17">Coerção de Tipos primitivo – converte um tipo primitivo para outro, <text:span text:style-name="T10">veja exemplo abaixo</text:span></text:p>
      <text:p text:style-name="P17"/>
      <text:p text:style-name="P18"><text:span text:style-name="T10">int(</text:span>“<text:span text:style-name="T10">11”) + 11 == 22 – o onze é uma string, convertendo passa a ser um número inteiro, se não converter vai dar erro.</text:span></text:p>
      <text:p text:style-name="P18"/>
      <text:p text:style-name="P18"># conversão de tipos, coerção</text:p>
      <text:p text:style-name="P18"># type convertion, typecasting, coercion</text:p>
      <text:p text:style-name="P18"># é o ato de converter um tipo em outro</text:p>
      <text:p text:style-name="P18"># <text:s/>tipos imutáveis e primitivos:</text:p>
      <text:p text:style-name="P18"># str, int, float, bool</text:p>
      <text:p text:style-name="P18"/>
      <text:p text:style-name="P18">print(int('1'), type(int('1')))</text:p>
      <text:p text:style-name="P18">print(type(float('1') + 1))</text:p>
      <text:p text:style-name="P18">print(bool(' '))</text:p>
      <text:p text:style-name="P18">print(str(11) + 'b')</text:p>
      <text:p text:style-name="P18"/>
      <text:p text:style-name="P19">Introdução as váriaveis Python:</text:p>
      <text:p text:style-name="P18"/>
      <text:p text:style-name="P18"># Variáveis são usadas para salvar algo na memória do computador.</text:p>
      <text:p text:style-name="P18"># PEP8: inicie variáveis com letras minúsculas, pode usar</text:p>
      <text:p text:style-name="P18"># números e underline _.</text:p>
      <text:p text:style-name="P18"># O sinal de = é o operador de atribuição. Ele é usado para</text:p>
      <text:p text:style-name="P18"># atribuir um valor a um nome (variável).</text:p>
      <text:p text:style-name="P18"># Uso: nome_variavel = expressão</text:p>
      <text:p text:style-name="P18"/>
      <text:p text:style-name="P18"># nome_completo = 'Luiz Otávio Miranda'</text:p>
      <text:p text:style-name="P18"># soma_dois_mais_dois = 2 + 2</text:p>
      <text:p text:style-name="P18"># int_um = bool('1')</text:p>
      <text:p text:style-name="P18"># print(int_um, type(int_um))</text:p>
      <text:p text:style-name="P18"># print(nome_completo, soma_dois_mais_dois)</text:p>
      <text:p text:style-name="P18"/>
      <text:p text:style-name="P18">nome = 'Luiz'</text:p>
      <text:p text:style-name="P18">idade = 17</text:p>
      <text:p text:style-name="P18">maior_de_idade = idade &gt;= 18</text:p>
      <text:p text:style-name="P18">print('Nome:', nome, 'Idade:', idade)</text:p>
      <text:p text:style-name="P18">print('É maior?', maior_de_idade)</text:p>
      <text:p text:style-name="P18"/>
      <text:p text:style-name="P20">Introdução aos operadores aritméticos:</text:p>
      <text:p text:style-name="P21"/>
      <text:p text:style-name="P21">adicao = 10 + 10</text:p>
      <text:p text:style-name="P21">print('Adição', adicao)</text:p>
      <text:p text:style-name="P21"/>
      <text:p text:style-name="P21">subtracao = 10 - 5</text:p>
      <text:p text:style-name="P21"><text:soft-page-break/>print('Subtração', subtracao)</text:p>
      <text:p text:style-name="P21"/>
      <text:p text:style-name="P21">multiplicacao = 10 * 10</text:p>
      <text:p text:style-name="P21">print('Multiplicação', multiplicacao)</text:p>
      <text:p text:style-name="P21"/>
      <text:p text:style-name="P21">divisao = 10 / 3 <text:s/># float</text:p>
      <text:p text:style-name="P21">print('Divisão', divisao)</text:p>
      <text:p text:style-name="P21"/>
      <text:p text:style-name="P21">divisao_inteira = 10 // 3</text:p>
      <text:p text:style-name="P21">print('Divisão inteira', divisao_inteira)</text:p>
      <text:p text:style-name="P21"/>
      <text:p text:style-name="P21">exponenciacao = 2 ** 10</text:p>
      <text:p text:style-name="P21">print('Exponenciação', exponenciacao)</text:p>
      <text:p text:style-name="P21"/>
      <text:p text:style-name="P21">modulo = 55 % 2 <text:s/># resto da divisão</text:p>
      <text:p text:style-name="P21">print('Módulo', modulo)</text:p>
      <text:p text:style-name="P21"/>
      <text:p text:style-name="P22"># Aqui está sendo verificado se é ou não divisivel pelos valores, e o resultado vai ser booleano, se é True ou False:</text:p>
      <text:p text:style-name="P22"/>
      <text:p text:style-name="P21">print(10 % 8 == 0)</text:p>
      <text:p text:style-name="P21">print(16 % 8 == 0)</text:p>
      <text:p text:style-name="P23"/>
      <text:p text:style-name="P24"># Aqui você pode verificar se o número é par ou impar, e o resultado também é booleano:</text:p>
      <text:p text:style-name="P23"/>
      <text:p text:style-name="P21"><text:span text:style-name="T11">print(10 % 2 == </text:span>0)</text:p>
      <text:p text:style-name="P21">print(15 % 2 == 0)</text:p>
      <text:p text:style-name="P21">print(16 % 2 == 0)</text:p>
      <text:p text:style-name="P21"/>
      <text:p text:style-name="P25">Concatenação e repetição com operadores aritméticos:</text:p>
      <text:p text:style-name="P26"/>
      <text:p text:style-name="P27">Juntando um nome com outro:</text:p>
      <text:p text:style-name="P27"/>
      <text:p text:style-name="P27">concatenacao = 'Luiz' + ' ' + 'Otávio'</text:p>
      <text:p text:style-name="P27">print(concatenacao)</text:p>
      <text:p text:style-name="P27"/>
      <text:p text:style-name="P28">Resultado:</text:p>
      <text:p text:style-name="P28">Luiz Otávio</text:p>
      <text:p text:style-name="P27"/>
      <text:p text:style-name="P27">Replicando letras com o sinal de multiplicação, <text:span text:style-name="T12">fazendo repetição das letras</text:span>:</text:p>
      <text:p text:style-name="P27"/>
      <text:p text:style-name="P27">a_dez_vezes = 'A' * 10</text:p>
      <text:p text:style-name="P27">tres_vezes_luiz = 3 * 'Luiz'</text:p>
      <text:p text:style-name="P27">print(a_dez_vezes)</text:p>
      <text:p text:style-name="P27">print(tres_vezes_luiz)</text:p>
      <text:p text:style-name="P27"/>
      <text:p text:style-name="P28">Resultados:</text:p>
      <text:p text:style-name="P28"/>
      <text:p text:style-name="P28">AAAAAAAAAA</text:p>
      <text:p text:style-name="P28">LuizLuizLuiz</text:p>
      <text:p text:style-name="P28"/>
      <text:p text:style-name="P29">precedência entre operadores aritméticos:</text:p>
      <text:p text:style-name="P30"><text:soft-page-break/>Tudo que estiver entre parênteses é executado primeiro:</text:p>
      <text:p text:style-name="P31"/>
      <text:p text:style-name="P31"># 1. (n + n) </text:p>
      <text:p text:style-name="P31"/>
      <text:p text:style-name="P30">se não, a ordem é da forma que está abaixo:</text:p>
      <text:p text:style-name="P30"/>
      <text:p text:style-name="P28"># 2. ** - <text:span text:style-name="T13">Potenciação</text:span></text:p>
      <text:p text:style-name="P28"># 3. * / // % - <text:span text:style-name="T13">Multiplicação, divisão, divisão inteira, resto da divisão</text:span></text:p>
      <text:p text:style-name="P28"># 4. + - : <text:span text:style-name="T13">adição e subtração</text:span></text:p>
      <text:p text:style-name="P28"/>
      <text:p text:style-name="P28">conta_1 = (1 + int(0.5 + 0.5)) ** (5 + 5)</text:p>
      <text:p text:style-name="P28">print(conta_1)</text:p>
      <text:p text:style-name="P28"/>
      <text:p text:style-name="P32">Resultado:</text:p>
      <text:p text:style-name="P32"/>
      <text:p text:style-name="P32">1024</text:p>
      <text:p text:style-name="P28"/>
      <text:p text:style-name="P33">Introdução as f-strings, formatação de string:</text:p>
      <text:p text:style-name="P34"/>
      <text:p text:style-name="P28">nome = 'Luiz Otávio'</text:p>
      <text:p text:style-name="P28">altura = 1.80</text:p>
      <text:p text:style-name="P28">peso = 95</text:p>
      <text:p text:style-name="P28">imc = peso / altura ** 2</text:p>
      <text:p text:style-name="P28"/>
      <text:p text:style-name="P28">"f-strings"</text:p>
      <text:p text:style-name="P28"/>
      <text:p text:style-name="P28">linha_1 = f'{nome} tem {altura:.2f} de altura,'</text:p>
      <text:p text:style-name="P28">linha_2 = f'pesa {peso} quilos e seu imc é'</text:p>
      <text:p text:style-name="P28">linha_3 = f'{imc:.2f}'</text:p>
      <text:p text:style-name="P28"/>
      <text:p text:style-name="P28">print(linha_1)</text:p>
      <text:p text:style-name="P28">print(linha_2)</text:p>
      <text:p text:style-name="P28">print(linha_3)</text:p>
      <text:p text:style-name="P28"/>
      <text:p text:style-name="P35">Resultado:</text:p>
      <text:p text:style-name="P35"/>
      <text:p text:style-name="P28"># Luiz Otávio tem 1.80 de altura,</text:p>
      <text:p text:style-name="P28"># pesa 95 quilos e seu IMC é</text:p>
      <text:p text:style-name="P28"># 29.320987654320987</text:p>
      <text:p text:style-name="P28"/>
      <text:p text:style-name="P36">Formatação de Strings com o método format:</text:p>
      <text:p text:style-name="P37"/>
      <text:p text:style-name="P38"># Aqui o professsor colocou tudo em variáveis, pode ser utilizado somente as 3 variáve<text:span text:style-name="T14">i</text:span>s abaixo:</text:p>
      <text:p text:style-name="P38"/>
      <text:p text:style-name="P28">a = 'AAAAA'</text:p>
      <text:p text:style-name="P28">b = 'BBBBBB'</text:p>
      <text:p text:style-name="P28">c = 1.1</text:p>
      <text:p text:style-name="P28"/>
      <text:p text:style-name="P28">string = 'b={nome2} a={nome1} a={nome1} c={nome3:.2f}'</text:p>
      <text:p text:style-name="P28">formato = string.format(nome1=a, nome2=b, nome3=c)<text:span text:style-name="T15"># aqui você está nomeando suas variáveis</text:span></text:p>
      <text:p text:style-name="P28"/>
      <text:p text:style-name="P28">print(formato)</text:p>
      <text:p text:style-name="P39"><text:soft-page-break/>Exemplo simples:</text:p>
      <text:p text:style-name="P40"/>
      <text:p text:style-name="P41">a = 'AAAAA'</text:p>
      <text:p text:style-name="P42">b = 'BBBBBB'</text:p>
      <text:p text:style-name="P42">c = 1.1</text:p>
      <text:p text:style-name="P43"/>
      <text:p text:style-name="P42">print("A= {}, B= {}, C= {}".format(a, b, c))</text:p>
      <text:p text:style-name="P42"/>
      <text:p text:style-name="P44">resultado:</text:p>
      <text:p text:style-name="P44"/>
      <text:p text:style-name="P44">A= AAAAA, B= BBBBBB, C= 1.1</text:p>
      <text:p text:style-name="P42"/>
      <text:p text:style-name="P45">U<text:span text:style-name="T1">sando a função input para coletar dados do usuário:</text:span></text:p>
      <text:p text:style-name="P45"/>
      <text:p text:style-name="P46">nome = input('Qual o seu nome? ')</text:p>
      <text:p text:style-name="P47">print(f'O seu nome é {nome=}')</text:p>
      <text:p text:style-name="P43"/>
      <text:p text:style-name="P47">#se dentro das chaves{} você colocar = na frente, vai mostrar o nome da variável igual o valor da variável.</text:p>
      <text:p text:style-name="P47">"""</text:p>
      <text:p text:style-name="P47">resultado:</text:p>
      <text:p text:style-name="P43"/>
      <text:p text:style-name="P47">Qual o seu nome? David</text:p>
      <text:p text:style-name="P47">O seu nome é nome='David'</text:p>
      <text:p text:style-name="P43"/>
      <text:p text:style-name="P47">O input sempre vai receber uma string </text:p>
      <text:p text:style-name="P43"/>
      <text:p text:style-name="P47">"""</text:p>
      <text:p text:style-name="P43"/>
      <text:p text:style-name="P47">numero_1 = int(input('Digite um número: ')) # É possivel colocar int</text:p>
      <text:p text:style-name="P47"># na frente do input diretamente, mas o professor falou que pode </text:p>
      <text:p text:style-name="P47"># dar problemas futuros, dependendo do código</text:p>
      <text:p text:style-name="P47">numero_2 = input('Digite outro número: ')</text:p>
      <text:p text:style-name="P43"/>
      <text:p text:style-name="P47">int_numero_1 = int(numero_1)# convertendo o número string para int com outra variável</text:p>
      <text:p text:style-name="P47">int_numero_2 = int(numero_2)</text:p>
      <text:p text:style-name="P43"/>
      <text:p text:style-name="P47">print(f'A soma dos números é: {int_numero_1 + int_numero_2}')</text:p>
      <text:p text:style-name="P48"/>
      <text:p text:style-name="P49"># Introdução a estrutura condicional if/elif/else</text:p>
      <text:p text:style-name="P43"/>
      <text:p text:style-name="P47"># if / elif / else</text:p>
      <text:p text:style-name="P47"># se / se não se / se não</text:p>
      <text:p text:style-name="P47">entrada = input('Você quer "entrar" ou "sair"? ')</text:p>
      <text:p text:style-name="P43"/>
      <text:p text:style-name="P47">if entrada == 'entrar':</text:p>
      <text:p text:style-name="P47">print('Você entrou no sistema')</text:p>
      <text:p text:style-name="P43"/>
      <text:p text:style-name="P47">print(12341234)</text:p>
      <text:p text:style-name="P47"><text:soft-page-break/># O IF sempre vai ser uma condição verdadeira.</text:p>
      <text:p text:style-name="P47">elif entrada == 'sair':</text:p>
      <text:p text:style-name="P47">print('Você saiu do sistema')</text:p>
      <text:p text:style-name="P47">else:</text:p>
      <text:p text:style-name="P47">print('Você não digitou nem entrar e nem sair.')</text:p>
      <text:p text:style-name="P43"/>
      <text:p text:style-name="P47">print('FORA DOS BLOCOS')</text:p>
      <text:p text:style-name="P43"/>
      <text:p text:style-name="P47"># Entendendo o fluxo do interpretador em condicionais:</text:p>
      <text:p text:style-name="P43"/>
      <text:p text:style-name="P47"># if / elif / else</text:p>
      <text:p text:style-name="P47"># se / se não se / se não</text:p>
      <text:p text:style-name="P43"/>
      <text:p text:style-name="P47">condicao1 = True</text:p>
      <text:p text:style-name="P47">condicao2 = True</text:p>
      <text:p text:style-name="P47">condicao3 = True</text:p>
      <text:p text:style-name="P47">condicao4 = True</text:p>
      <text:p text:style-name="P43"/>
      <text:p text:style-name="P47">if condicao1:</text:p>
      <text:p text:style-name="P47">print('Código para condição 1')</text:p>
      <text:p text:style-name="P47">print('Código para condição 1')</text:p>
      <text:p text:style-name="P47">elif condicao2:</text:p>
      <text:p text:style-name="P47">print('Código para condição 2')</text:p>
      <text:p text:style-name="P47">elif condicao3:</text:p>
      <text:p text:style-name="P47">print('Código para condição 3')</text:p>
      <text:p text:style-name="P47">elif condicao4:</text:p>
      <text:p text:style-name="P47">print('Código para condição 4')</text:p>
      <text:p text:style-name="P47">else:</text:p>
      <text:p text:style-name="P47">print('Nenhuma condição foi satisfeita.')</text:p>
      <text:p text:style-name="P43"/>
      <text:p text:style-name="P47">if 10 == 10:</text:p>
      <text:p text:style-name="P47">print('Outro if')</text:p>
      <text:p text:style-name="P43"/>
      <text:p text:style-name="P47">print('Fora do if')</text:p>
      <text:p text:style-name="P42"/>
      <text:p text:style-name="P47">se você colocar dentro das condições, </text:p>
      <text:p text:style-name="P47">se não tiver nenhum código ainda, para não dar </text:p>
      <text:p text:style-name="P47">erro é só colocar elipses(...) ou pass, isso serve </text:p>
      <text:p text:style-name="P47">Estrutura condicionais e estrutura de repetição.</text:p>
      <text:p text:style-name="P47"/>
      <text:p text:style-name="P47"/>
      <text:p text:style-name="P50">Operadores de comparação (relacionais)</text:p>
      <text:p text:style-name="P51"/>
      <text:p text:style-name="P47">OP Significado Exemplo (True)</text:p>
      <text:p text:style-name="P47">&gt; maior 2 &gt; 1</text:p>
      <text:p text:style-name="P47">&gt;= maior ou igual 2 &gt;= 2</text:p>
      <text:p text:style-name="P47">&lt; menor 1 &lt; 2</text:p>
      <text:p text:style-name="P47">&lt;= menor ou igual 2 &lt;= 2</text:p>
      <text:p text:style-name="P47">== igual 'a' == 'a'</text:p>
      <text:p text:style-name="P47">!= diferente 'a' != 'b'</text:p>
      <text:p text:style-name="P47"/>
      <text:p text:style-name="P47"><text:soft-page-break/>maior = 2 &gt; 1</text:p>
      <text:p text:style-name="P47">maior_ou_igual = 2 &gt;= 2</text:p>
      <text:p text:style-name="P47">menor = 1 &lt; 2</text:p>
      <text:p text:style-name="P47">menor_ou_igual = 2 &lt;= 2</text:p>
      <text:p text:style-name="P47">igual = 'a' == 'a'</text:p>
      <text:p text:style-name="P47">diferente = 'a' != 'b'</text:p>
      <text:p text:style-name="P47">print('Olha meu print aqui')</text:p>
      <text:p text:style-name="P47"/>
      <text:p text:style-name="P50"># Operadores lógicos</text:p>
      <text:p text:style-name="P43"/>
      <text:p text:style-name="P47"># and (e) or (ou) not (não)</text:p>
      <text:p text:style-name="P47"># and - Todas as condições precisam ser</text:p>
      <text:p text:style-name="P47"># verdadeiras.</text:p>
      <text:p text:style-name="P43"/>
      <text:p text:style-name="P47"># Se qualquer valor for considerado falso,</text:p>
      <text:p text:style-name="P47"># a expressão inteira será avaliada naquele valor</text:p>
      <text:p text:style-name="P47"># São considerados falsy (que vc já viu)</text:p>
      <text:p text:style-name="P47"># 0 0.0 '' False</text:p>
      <text:p text:style-name="P43"/>
      <text:p text:style-name="P47"># Também existe o tipo None que é</text:p>
      <text:p text:style-name="P47"># usado para representar um não valor</text:p>
      <text:p text:style-name="P43"/>
      <text:p text:style-name="P47"># entrada = input('[E]ntrar [S]air: ')</text:p>
      <text:p text:style-name="P47"># senha_digitada = input('Senha: ')</text:p>
      <text:p text:style-name="P43"/>
      <text:p text:style-name="P47"># senha_permitida = '123456'</text:p>
      <text:p text:style-name="P43"/>
      <text:p text:style-name="P47"># if entrada == 'E' and senha_digitada == senha_permitida:</text:p>
      <text:p text:style-name="P47"># print('Entrar')</text:p>
      <text:p text:style-name="P47"># else:</text:p>
      <text:p text:style-name="P47"># print('Sair')</text:p>
      <text:p text:style-name="P43"/>
      <text:p text:style-name="P47"># Avaliação de curto circuito</text:p>
      <text:p text:style-name="P47">print(True and False and True)</text:p>
      <text:p text:style-name="P47">print(True and 0 and True)</text:p>
      <text:p text:style-name="P43"/>
      <text:p text:style-name="P47">if 1 and 1:</text:p>
      <text:p text:style-name="P47">print(True and 1 and False)</text:p>
      <text:p text:style-name="P43"/>
      <text:p text:style-name="P47"># Resultado:</text:p>
      <text:p text:style-name="P43"/>
      <text:p text:style-name="P47"># True</text:p>
      <text:p text:style-name="P47"># 0 - zero é considerado falsy(False)</text:p>
      <text:p text:style-name="P47"># False</text:p>
      <text:p text:style-name="P52"/>
      <text:p text:style-name="P53"># Operador lógico or:</text:p>
      <text:p text:style-name="P54"/>
      <text:p text:style-name="P55">if (entrada == 'E' or entrada == 'e') and senha_digitada == senha_permitida:</text:p>
      <text:p text:style-name="P47"># print('Entrar')</text:p>
      <text:p text:style-name="P47"># else:</text:p>
      <text:p text:style-name="P47"># print('Sair')</text:p>
      <text:p text:style-name="P43"><text:soft-page-break/></text:p>
      <text:p text:style-name="P47"># Avaliação de curto circuito</text:p>
      <text:p text:style-name="P47">senha = input('Senha: ') or 'Sem senha'</text:p>
      <text:p text:style-name="P53"/>
      <text:p text:style-name="P56"># Operador lógico "not"</text:p>
      <text:p text:style-name="P56"/>
      <text:p text:style-name="P57"># Usado para inverter expressões</text:p>
      <text:p text:style-name="P57"># not True = False# not False = True</text:p>
      <text:p text:style-name="P57"># senha = input('Senha: ')print(not True) <text:s/></text:p>
      <text:p text:style-name="P57"># Falseprint(not False) <text:s/># True</text:p>
      <text:p text:style-name="P57"/>
      <text:p text:style-name="P56"># Operadores in e not in</text:p>
      <text:p text:style-name="P57"/>
      <text:p text:style-name="P57"># Strings são iteráveis</text:p>
      <text:p text:style-name="P57"/>
      <text:p text:style-name="P57"># <text:s/>0 1 2 3 4 5</text:p>
      <text:p text:style-name="P57"># <text:s/>O t á v i o</text:p>
      <text:p text:style-name="P57"># -6-5-4-3-2-1</text:p>
      <text:p text:style-name="P57"/>
      <text:p text:style-name="P57"># nome = 'Otávio'</text:p>
      <text:p text:style-name="P57"># print(nome[2])</text:p>
      <text:p text:style-name="P57"># print(nome[-4])</text:p>
      <text:p text:style-name="P57"># print('vio' in nome)</text:p>
      <text:p text:style-name="P57"># print('zero' in nome)</text:p>
      <text:p text:style-name="P57"># print(10 * '-')</text:p>
      <text:p text:style-name="P57"># print('vio' not in nome)</text:p>
      <text:p text:style-name="P57"># print('zero' not in nome)</text:p>
      <text:p text:style-name="P57"/>
      <text:p text:style-name="P57">nome = input('Digite seu nome: ')</text:p>
      <text:p text:style-name="P57">encontrar = input('Digite o que deseja encontrar: ')</text:p>
      <text:p text:style-name="P57"/>
      <text:p text:style-name="P57">if encontrar in nome:</text:p>
      <text:p text:style-name="P57"><text:s text:c="4"/>print(f'{encontrar} está em {nome}')</text:p>
      <text:p text:style-name="P57">else:</text:p>
      <text:p text:style-name="P57"><text:s text:c="4"/>print(f'{encontrar} não está em {nome}')</text:p>
      <text:p text:style-name="P57"/>
      <text:p text:style-name="P56">Interpolação básica de strings:</text:p>
      <text:p text:style-name="P57"/>
      <text:p text:style-name="P57">s - string</text:p>
      <text:p text:style-name="P57">d e i - int</text:p>
      <text:p text:style-name="P57">f - float</text:p>
      <text:p text:style-name="P57">x e X - Hexadecimal (ABCDEF0123456789)</text:p>
      <text:p text:style-name="P57"/>
      <text:p text:style-name="P57">nome = 'Luiz'</text:p>
      <text:p text:style-name="P57">preco = 1000.95897643</text:p>
      <text:p text:style-name="P57">variavel = '%s, o preço é R$%.2f' % (nome, preco)</text:p>
      <text:p text:style-name="P58">]</text:p>
      <text:p text:style-name="P57">print(variavel)</text:p>
      <text:p text:style-name="P57">print('O hexadecimal de %d é %08X' % (1500, 1500))</text:p>
      <text:p text:style-name="P59">""</text:p>
      <text:p text:style-name="P50">Formatação básica de strings</text:p>
      <text:p text:style-name="P50"><text:soft-page-break/></text:p>
      <text:p text:style-name="P47">s - string</text:p>
      <text:p text:style-name="P47">d - int</text:p>
      <text:p text:style-name="P47">f - float</text:p>
      <text:p text:style-name="P47">.&lt;número de dígitos&gt;f</text:p>
      <text:p text:style-name="P47">x ou X - Hexadecimal</text:p>
      <text:p text:style-name="P47">(Caractere)(&gt;&lt;^)(quantidade)</text:p>
      <text:p text:style-name="P47">&gt; - Esquerda</text:p>
      <text:p text:style-name="P47">&lt; - Direita</text:p>
      <text:p text:style-name="P47">^ - Centro</text:p>
      <text:p text:style-name="P47">= - Força o número a aparecer antes dos zeros</text:p>
      <text:p text:style-name="P47">Sinal - + ou -</text:p>
      <text:p text:style-name="P47">Ex.: 0&gt;-100,.1f</text:p>
      <text:p text:style-name="P47">Conversion flags - !r !s !a </text:p>
      <text:p text:style-name="P47">"""</text:p>
      <text:p text:style-name="P47">variavel = 'ABC'</text:p>
      <text:p text:style-name="P47">print(f'{variavel}')</text:p>
      <text:p text:style-name="P47">print(f'{variavel: &gt;10}')</text:p>
      <text:p text:style-name="P47">print(f'{variavel: &lt;10}.')</text:p>
      <text:p text:style-name="P47">print(f'{variavel: ^10}.')</text:p>
      <text:p text:style-name="P47">print(f'{1000.4873648123746:0=+10,.1f}')</text:p>
      <text:p text:style-name="P47">print(f'O hexadecimal de 1500 é {1500:08X}')</text:p>
      <text:p text:style-name="P47">print(f'{variavel!r}')</text:p>
      <text:p text:style-name="P43"/>
      <text:p text:style-name="P47">"""</text:p>
      <text:p text:style-name="P50">Fatiamento de strings</text:p>
      <text:p text:style-name="P50"/>
      <text:p text:style-name="P47">012345678</text:p>
      <text:p text:style-name="P47">Olá mundo</text:p>
      <text:p text:style-name="P47">-987654321</text:p>
      <text:p text:style-name="P47">Fatiamento [i:f:p] [::]</text:p>
      <text:p text:style-name="P47">Obs.: a função len retorna a qtd </text:p>
      <text:p text:style-name="P47">de caracteres da str</text:p>
      <text:p text:style-name="P47">"""</text:p>
      <text:p text:style-name="P47">variavel = 'Olá mundo'</text:p>
      <text:p text:style-name="P47">print(variavel[::-1])</text:p>
      <text:p text:style-name="P57"/>
      <text:p text:style-name="P60">Introdução ao try e except para capturar erros:</text:p>
      <text:p text:style-name="P60"/>
      <text:p text:style-name="P60"/>
      <text:p text:style-name="P61"><text:span text:style-name="T16">try</text:span>:</text:p>
      <text:p text:style-name="P61"><text:span text:style-name="T17">print</text:span><text:span text:style-name="T18">(</text:span><text:span text:style-name="T19">int</text:span><text:span text:style-name="T18">(</text:span><text:span text:style-name="T20">"</text:span><text:span text:style-name="T21">a</text:span><text:span text:style-name="T20">"</text:span><text:span text:style-name="T18">))</text:span></text:p>
      <text:p text:style-name="P61"><text:span text:style-name="T16">except</text:span>:</text:p>
      <text:p text:style-name="P61"><text:span text:style-name="T17">print</text:span><text:span text:style-name="T18">(</text:span><text:span text:style-name="T20">"</text:span><text:span text:style-name="T21">Esse valor não é um número inteiro</text:span><text:span text:style-name="T20">"</text:span><text:span text:style-name="T18">)</text:span></text:p>
      <text:p text:style-name="P62"/>
      <text:p text:style-name="P47">try:</text:p>
      <text:p text:style-name="P47">numero = input("Dobrar o núnero que você digita: ")</text:p>
      <text:p text:style-name="P43"/>
      <text:p text:style-name="P47">numero_float = float(numero)</text:p>
      <text:p text:style-name="P43"/>
      <text:p text:style-name="P47">print(f"O dobro de {numero} é {numero_float * 2:.2f}.")</text:p>
      <text:p text:style-name="P47"><text:soft-page-break/>except:</text:p>
      <text:p text:style-name="P47">print("O valor não é um número!")</text:p>
      <text:p text:style-name="P43"/>
      <text:p text:style-name="P47">"""</text:p>
      <text:p text:style-name="P47">O programa acima poderia ser resolvido com if e else, </text:p>
      <text:p text:style-name="P47">mas o programa seria todo executado, mas o erro seria </text:p>
      <text:p text:style-name="P47">escondido pelo else, try e except vai fazer o código</text:p>
      <text:p text:style-name="P47">parar de emediato ao erro, e o nome disso é fail fast </text:p>
      <text:p text:style-name="P47">- falha rápida, e não vai executar o restante do código,</text:p>
      <text:p text:style-name="P47">vai direto para o except.</text:p>
      <text:p text:style-name="P47">Utilizar o except sem expecificar o erro é errado, isso</text:p>
      <text:p text:style-name="P47">vai ser mostra mais a frente.</text:p>
      <text:p text:style-name="P47">"""</text:p>
      <text:p text:style-name="P42"/>
      <text:p text:style-name="P42">""</text:p>
      <text:p text:style-name="P50">Variáveis, constantes e complexidade de código.</text:p>
      <text:p text:style-name="P43"/>
      <text:p text:style-name="P47">Constatnte = "Variáveis" que não iram mudar</text:p>
      <text:p text:style-name="P47">Muitas condicões no mesmo if (ruim)</text:p>
      <text:p text:style-name="P47">&lt;- Contagem de Complexidade (ruim)</text:p>
      <text:p text:style-name="P47">"""</text:p>
      <text:p text:style-name="P43"/>
      <text:p text:style-name="P47">velocidade = 61</text:p>
      <text:p text:style-name="P47">local_carro = 100</text:p>
      <text:p text:style-name="P43"/>
      <text:p text:style-name="P47"># No Python é utilizado letras maiúsculas para variáveis </text:p>
      <text:p text:style-name="P47"># que não vai mudar no código, isso é uma convenção entre os</text:p>
      <text:p text:style-name="P47"># progrmadores python, isso vai mostrar para outros programadores</text:p>
      <text:p text:style-name="P47"># que essas váriáveis são constantes.</text:p>
      <text:p text:style-name="P43"/>
      <text:p text:style-name="P47">RADAR_1 = 60 # Velocidade atual do carro</text:p>
      <text:p text:style-name="P47">LOCAL_1 = 100 # Local onde o radar 1 está</text:p>
      <text:p text:style-name="P47">RADAR_RANGE = 1 # A distância onde o radar pega.</text:p>
      <text:p text:style-name="P43"/>
      <text:p text:style-name="P47">vel_carro_pass_radar_1 = velocidade &gt; RADAR_1</text:p>
      <text:p text:style-name="P47">carro_passou_radar_1 = local_carro &gt;= (LOCAL_1 - RADAR_RANGE) and \</text:p>
      <text:p text:style-name="P47">local_carro &lt;= (LOCAL_1 + RADAR_RANGE)</text:p>
      <text:p text:style-name="P47">carro_multado_radar_1 = carro_passou_radar_1 and vel_carro_pass_radar_1</text:p>
      <text:p text:style-name="P43"/>
      <text:p text:style-name="P47">if vel_carro_pass_radar_1:</text:p>
      <text:p text:style-name="P47">print('Velocidade carro passou do radar 1')</text:p>
      <text:p text:style-name="P43"/>
      <text:p text:style-name="P47">if carro_passou_radar_1:</text:p>
      <text:p text:style-name="P47">print('Carro passou radar 1')</text:p>
      <text:p text:style-name="P43"/>
      <text:p text:style-name="P47">if carro_multado_radar_1:</text:p>
      <text:p text:style-name="P47">print('carro multado em radar 1')</text:p>
      <text:p text:style-name="P43"/>
      <text:p text:style-name="P47">"""</text:p>
      <text:p text:style-name="P47">O que o professor está querendo mostrar aqui é, que é necessário </text:p>
      <text:p text:style-name="P47">deixar o código limpo e legível, deixar o código o mais </text:p>
      <text:p text:style-name="P47"><text:soft-page-break/>simples possível, colocando códigos em variáveis etc, para não</text:p>
      <text:p text:style-name="P47">deixar o código bagunçado, para futuramente você ou outro programador</text:p>
      <text:p text:style-name="P47">entender o código.</text:p>
      <text:p text:style-name="P47">"""</text:p>
      <text:p text:style-name="P47"/>
      <text:p text:style-name="P47">"""</text:p>
      <text:p text:style-name="P47">Flag(Bandeira) - Marcar um Local</text:p>
      <text:p text:style-name="P47">None = Não valor</text:p>
      <text:p text:style-name="P47">is e is not = é ou não é(tipo, valor, identidade)</text:p>
      <text:p text:style-name="P47">id = Identidade</text:p>
      <text:p text:style-name="P47">"""</text:p>
      <text:p text:style-name="P43"/>
      <text:p text:style-name="P47">condicao = False</text:p>
      <text:p text:style-name="P47">passou_no_if = None</text:p>
      <text:p text:style-name="P43"/>
      <text:p text:style-name="P47">if condicao:</text:p>
      <text:p text:style-name="P47">passou_no_if = True</text:p>
      <text:p text:style-name="P47">print("Faça algo")</text:p>
      <text:p text:style-name="P47">else:</text:p>
      <text:p text:style-name="P47">print("Não faça algo")</text:p>
      <text:p text:style-name="P43"/>
      <text:p text:style-name="P47">print(passou_no_if, passou_no_if is None)</text:p>
      <text:p text:style-name="P47">print(passou_no_if, passou_no_if is not None)</text:p>
      <text:p text:style-name="P43"/>
      <text:p text:style-name="P47"># Para ver a identidade das variáveis é utilizado o id():</text:p>
      <text:p text:style-name="P43"/>
      <text:p text:style-name="P47"># v1 = "a"</text:p>
      <text:p text:style-name="P47"># print(id(v1))</text:p>
      <text:p text:style-name="P43"/>
      <text:p text:style-name="P47"># resultado:</text:p>
      <text:p text:style-name="P43"/>
      <text:p text:style-name="P47"># 11789264 - é a identidade de uma variável na memória.</text:p>
      <text:p text:style-name="P42"/>
      <text:p text:style-name="P63">Tipos built-in, documentação, tipo imutáveis, métodos de strings:</text:p>
      <text:p text:style-name="P64"/>
      <text:p text:style-name="P47">https://docs.python.org/pt-br/3/library/stdtypes.html</text:p>
      <text:p text:style-name="P47">Imutáveis que vimos: str, int, float, bool – <text:span text:style-name="T22">são objetos e dentro deles existe ações que podem ser executados dentro destes objetos.</text:span></text:p>
      <text:p text:style-name="P47"/>
      <text:p text:style-name="P47">string = '1000' – <text:span text:style-name="T22">Este valor é imutável, você não consegue mudar ele</text:span></text:p>
      <text:p text:style-name="P47"/>
      <text:p text:style-name="P47"># outra_variavel = f'{string[:3]}ABC{string[4:]}' <text:span text:style-name="T22">é possível modificar criando outra variável</text:span></text:p>
      <text:p text:style-name="P47"/>
      <text:p text:style-name="P47"># print(string)</text:p>
      <text:p text:style-name="P47"/>
      <text:p text:style-name="P65">resposta:</text:p>
      <text:p text:style-name="P65"/>
      <text:p text:style-name="P65">1000</text:p>
      <text:p text:style-name="P65"/>
      <text:p text:style-name="P47"># print(outra_variavel)</text:p>
      <text:p text:style-name="P66">resposta:</text:p>
      <text:p text:style-name="P66"><text:soft-page-break/></text:p>
      <text:p text:style-name="P66">100ABC</text:p>
      <text:p text:style-name="P47"/>
      <text:p text:style-name="P47">print(string.zfill(10)) - .<text:span text:style-name="T23">zfill() é um método da string, </text:span><text:span text:style-name="T24">ele coloca o total de caracteres nesse caso com 10 caracteres</text:span><text:span text:style-name="T23">, como .upper(), .lower(), .isnumeric() etc …</text:span></text:p>
      <text:p text:style-name="P47"/>
      <text:p text:style-name="P65">resposta:</text:p>
      <text:p text:style-name="P65"/>
      <text:p text:style-name="P65">0000001000</text:p>
      <text:p text:style-name="P65"/>
      <text:p text:style-name="P65"><text:span text:style-name="T25">Estrutura de </text:span>Repeti<text:span text:style-name="T25">ção while:</text:span></text:p>
      <text:p text:style-name="P65"/>
      <text:p text:style-name="P65">while (enquanto)</text:p>
      <text:p text:style-name="P65">Executa uma ação enquanto uma condição for verdadeira</text:p>
      <text:p text:style-name="P65">Loop infinito -&gt; Quando um código não tem fim</text:p>
      <text:p text:style-name="P67"/>
      <text:p text:style-name="P67">condicao = True</text:p>
      <text:p text:style-name="P65"/>
      <text:p text:style-name="P65">while condicao:</text:p>
      <text:p text:style-name="P65"><text:s text:c="4"/>nome = input('Qual o seu nome: ')</text:p>
      <text:p text:style-name="P65"><text:s text:c="4"/>print(f'Seu nome é {nome}')</text:p>
      <text:p text:style-name="P65"/>
      <text:p text:style-name="P65"><text:s text:c="4"/>if nome == 'sair':</text:p>
      <text:p text:style-name="P65"><text:s text:c="8"/>break</text:p>
      <text:p text:style-name="P65"/>
      <text:p text:style-name="P65">print('Acabou')</text:p>
      <text:p text:style-name="P65"/>
      <text:p text:style-name="P68">Acima mostra que se não colocar o break ou um comando do tipo booleano, o código vai se manter no loop infinito.</text:p>
      <text:p text:style-name="P69"/>
      <text:p text:style-name="P70">Condição em detalhes:</text:p>
      <text:p text:style-name="P70"/>
      <text:p text:style-name="P69">contador = 0<text:line-break/><text:line-break/>while contador &lt;= 10:<text:line-break/> <text:s text:c="3"/>contador = contador + 1<text:line-break/> <text:s text:c="3"/>print(contador)<text:line-break/><text:line-break/>print('Acabou')</text:p>
      <text:p text:style-name="P69"/>
      <text:p text:style-name="P70">Fazendo um contador, e mostrando a utilização de operadores aritmético e de atribuição.</text:p>
      <text:p text:style-name="P70"/>
      <text:p text:style-name="P71">Operadores de atribuição com operadores aritméticos</text:p>
      <text:p text:style-name="P71"/>
      <text:p text:style-name="P71"><text:span text:style-name="T26">Os operadores de atribuição em Python </text:span><text:span text:style-name="T27">são usados ​​para armazenar valores em variáveis</text:span><text:span text:style-name="T26">. O operador básico é o sinal de igual (=), que atribui o valor da direita à variável da esquerda. Também existem métodos compostos que realizam uma operação matemática e atribuição simultânea.</text:span></text:p>
      <text:p text:style-name="P72"><text:line-break/><text:span text:style-name="T28">Operadores de atribuição<text:line-break/>= += -= *= /= //= **= %=</text:span></text:p>
      <text:p text:style-name="P73"><text:soft-page-break/>contador = 10<text:line-break/><text:line-break/>contador /= 5<text:line-break/>print(contador)</text:p>
      <text:p text:style-name="P73"/>
      <text:p text:style-name="P74"><text:span text:style-name="T29">Repetição While + continue – Pulando </text:span><text:span text:style-name="T30">alg</text:span><text:span text:style-name="T29">uma repetição</text:span></text:p>
      <text:p text:style-name="P74"/>
      <text:p text:style-name="P75">Utilizando continue em while você consegue ignorar algum passe que você deseja que ele não faça, e mantenha o programa funcionando perfeitamente, e como mostra abaixo ele vai mostrar os dados analisados, e os que foram ignorados não vai aparecer como mostra no exemplo abaixo: </text:p>
      <text:p text:style-name="P74"/>
      <text:p text:style-name="P74">contador = 0<text:line-break/>while contador &lt;= 100:<text:line-break/><text:tab/>contador += 1<text:line-break/><text:line-break/> <text:tab/>if contador == 6:<text:line-break/> <text:tab/><text:tab/>print('Não vou mostrar o 6.')<text:line-break/> <text:tab/><text:tab/>continue<text:line-break/><text:line-break/> <text:tab/>if contador &gt;= 10 and contador &lt;= 27:<text:line-break/> <text:tab/><text:tab/>print('Não vou mostrar o', contador)<text:line-break/> <text:tab/><text:tab/>continue<text:line-break/><text:line-break/> <text:tab/>print(contador)<text:line-break/><text:line-break/> <text:tab/>if contador == 40:<text:line-break/> <text:tab/><text:tab/>break<text:line-break/><text:line-break/><text:line-break/>print('Acabou')</text:p>
      <text:p text:style-name="P74"/>
      <text:p text:style-name="P76">Resultado:</text:p>
      <text:p text:style-name="P76"/>
      <text:p text:style-name="P76">1</text:p>
      <text:p text:style-name="P76">2</text:p>
      <text:p text:style-name="P76">3</text:p>
      <text:p text:style-name="P76">4</text:p>
      <text:p text:style-name="P76">5</text:p>
      <text:p text:style-name="P76">Não vou mostrar o 6.</text:p>
      <text:p text:style-name="P76">7</text:p>
      <text:p text:style-name="P76">8</text:p>
      <text:p text:style-name="P76">9</text:p>
      <text:p text:style-name="P76">Não vou mostrar o 10</text:p>
      <text:p text:style-name="P76">Não vou mostrar o 11</text:p>
      <text:p text:style-name="P76">Não vou mostrar o 12</text:p>
      <text:p text:style-name="P76">Não vou mostrar o 13</text:p>
      <text:p text:style-name="P76">Não vou mostrar o 14</text:p>
      <text:p text:style-name="P76">Não vou mostrar o 15</text:p>
      <text:p text:style-name="P76">Não vou mostrar o 16</text:p>
      <text:p text:style-name="P76">Não vou mostrar o 17</text:p>
      <text:p text:style-name="P76"><text:soft-page-break/>Não vou mostrar o 18</text:p>
      <text:p text:style-name="P76">Não vou mostrar o 19</text:p>
      <text:p text:style-name="P76">Não vou mostrar o 20</text:p>
      <text:p text:style-name="P76">Não vou mostrar o 21</text:p>
      <text:p text:style-name="P76">Não vou mostrar o 22</text:p>
      <text:p text:style-name="P76">Não vou mostrar o 23</text:p>
      <text:p text:style-name="P76">Não vou mostrar o 24</text:p>
      <text:p text:style-name="P76">Não vou mostrar o 25</text:p>
      <text:p text:style-name="P76">Não vou mostrar o 26</text:p>
      <text:p text:style-name="P76">Não vou mostrar o 27</text:p>
      <text:p text:style-name="P76">28</text:p>
      <text:p text:style-name="P76">29</text:p>
      <text:p text:style-name="P76">30</text:p>
      <text:p text:style-name="P76">31</text:p>
      <text:p text:style-name="P76">32</text:p>
      <text:p text:style-name="P76">33</text:p>
      <text:p text:style-name="P76">34</text:p>
      <text:p text:style-name="P76">35</text:p>
      <text:p text:style-name="P76">36</text:p>
      <text:p text:style-name="P76">37</text:p>
      <text:p text:style-name="P76">38</text:p>
      <text:p text:style-name="P76">39</text:p>
      <text:p text:style-name="P76">40</text:p>
      <text:p text:style-name="P76">Acabou</text:p>
      <text:p text:style-name="P76"/>
      <text:p text:style-name="P77">while + while (Laços internos)</text:p>
      <text:p text:style-name="P77"/>
      <text:p text:style-name="P78">Abaixo está mostrando uma tabela mostrando a linha e a coluna dessa tabela, utilizando while aninhados:</text:p>
      <text:p text:style-name="P77"/>
      <text:p text:style-name="P77">td_linhas = 5<text:line-break/>qtd_colunas = 5<text:line-break/><text:line-break/>linha = 1<text:line-break/>while linha &lt;= qtd_linhas:<text:line-break/> coluna = 1<text:line-break/> while coluna &lt;= qtd_colunas:<text:line-break/> print(f'{linha=} {coluna=}')<text:line-break/> coluna += 1<text:line-break/> linha += 1<text:line-break/><text:line-break/>print('Acabou')</text:p>
      <text:p text:style-name="P77"/>
      <text:p text:style-name="P78">Resultado:</text:p>
      <text:p text:style-name="P78"/>
      <text:p text:style-name="P78">linha=1 coluna=1</text:p>
      <text:p text:style-name="P78">linha=1 coluna=2</text:p>
      <text:p text:style-name="P78">linha=1 coluna=3</text:p>
      <text:p text:style-name="P78">linha=1 coluna=4</text:p>
      <text:p text:style-name="P78">linha=1 coluna=5</text:p>
      <text:p text:style-name="P78">linha=2 coluna=1</text:p>
      <text:p text:style-name="P78"><text:soft-page-break/>linha=2 coluna=2</text:p>
      <text:p text:style-name="P78">linha=2 coluna=3</text:p>
      <text:p text:style-name="P78">linha=2 coluna=4</text:p>
      <text:p text:style-name="P78">linha=2 coluna=5</text:p>
      <text:p text:style-name="P78">linha=3 coluna=1</text:p>
      <text:p text:style-name="P78">linha=3 coluna=2</text:p>
      <text:p text:style-name="P78">linha=3 coluna=3</text:p>
      <text:p text:style-name="P78">linha=3 coluna=4</text:p>
      <text:p text:style-name="P78">linha=3 coluna=5</text:p>
      <text:p text:style-name="P78">linha=4 coluna=1</text:p>
      <text:p text:style-name="P78">linha=4 coluna=2</text:p>
      <text:p text:style-name="P78">linha=4 coluna=3</text:p>
      <text:p text:style-name="P78">linha=4 coluna=4</text:p>
      <text:p text:style-name="P78">linha=4 coluna=5</text:p>
      <text:p text:style-name="P78">linha=5 coluna=1</text:p>
      <text:p text:style-name="P78">linha=5 coluna=2</text:p>
      <text:p text:style-name="P78">linha=5 coluna=3</text:p>
      <text:p text:style-name="P78">linha=5 coluna=4</text:p>
      <text:p text:style-name="P78">linha=5 coluna=5</text:p>
      <text:p text:style-name="P78">Acabou</text:p>
      <text:p text:style-name="P78"/>
      <text:p text:style-name="P79">while/else</text:p>
      <text:p text:style-name="P79"/>
      <text:p text:style-name="P80">O el<text:span text:style-name="T31">se no while serve para você mostrar alguma frase como mostra o exemplo abaixo, mas esse método dificilmente é utilizado.</text:span></text:p>
      <text:p text:style-name="P80"/>
      <text:p text:style-name="P81">string = 'Valor qualquer'</text:p>
      <text:p text:style-name="P43"/>
      <text:p text:style-name="P47">i = 0</text:p>
      <text:p text:style-name="P47">while i &lt; len(string):</text:p>
      <text:p text:style-name="P82">    <text:span text:style-name="T32">letra = string[i]</text:span></text:p>
      <text:p text:style-name="P43"/>
      <text:p text:style-name="P82">    <text:span text:style-name="T32">if letra == ' ':</text:span></text:p>
      <text:p text:style-name="P82">        <text:span text:style-name="T32">break</text:span></text:p>
      <text:p text:style-name="P43"/>
      <text:p text:style-name="P82">    <text:span text:style-name="T32">print(letra)</text:span></text:p>
      <text:p text:style-name="P82">    <text:span text:style-name="T32">i += 1</text:span></text:p>
      <text:p text:style-name="P47">else:</text:p>
      <text:p text:style-name="P82">    <text:span text:style-name="T32">print('Não encontrei um espaço na string.')</text:span></text:p>
      <text:p text:style-name="P47">print('Fora do while.')</text:p>
      <text:p text:style-name="P79"/>
      <text:p text:style-name="P83">No código acima verifica se existe algum espaço entre as palavras ou não, se não tive<text:span text:style-name="T33">r</text:span> espaço o el<text:span text:style-name="T33">se vai funcionar.</text:span></text:p>
      <text:p text:style-name="P83"/>
      <text:p text:style-name="P84">Resultado:</text:p>
      <text:p text:style-name="P84"/>
      <text:p text:style-name="P84">Com espaço:</text:p>
      <text:p text:style-name="P84"/>
      <text:p text:style-name="P84">V</text:p>
      <text:p text:style-name="P84">a</text:p>
      <text:p text:style-name="P84">l</text:p>
      <text:p text:style-name="P84"><text:soft-page-break/>o</text:p>
      <text:p text:style-name="P84">r</text:p>
      <text:p text:style-name="P84">Fora do while.</text:p>
      <text:p text:style-name="P84"/>
      <text:p text:style-name="P85">Aqui está mostrando a palavra até onde tem o espaço.</text:p>
      <text:p text:style-name="P84"/>
      <text:p text:style-name="P86">Sem espaço:</text:p>
      <text:p text:style-name="P86"/>
      <text:p text:style-name="P86">V</text:p>
      <text:p text:style-name="P86">a</text:p>
      <text:p text:style-name="P86">l</text:p>
      <text:p text:style-name="P86">o</text:p>
      <text:p text:style-name="P86">r</text:p>
      <text:p text:style-name="P86">q</text:p>
      <text:p text:style-name="P86">u</text:p>
      <text:p text:style-name="P86">a</text:p>
      <text:p text:style-name="P86">l</text:p>
      <text:p text:style-name="P86">q</text:p>
      <text:p text:style-name="P86">u</text:p>
      <text:p text:style-name="P86">e</text:p>
      <text:p text:style-name="P86">r</text:p>
      <text:p text:style-name="P86">Não encontrei um espaço na string.</text:p>
      <text:p text:style-name="P86">Fora do while.</text:p>
      <text:p text:style-name="P86"/>
      <text:p text:style-name="P85">Aqui a palavra está tudo junto e sem espaço, e mostrando a frase que está dentro do else.</text:p>
      <text:p text:style-name="P87"/>
      <text:p text:style-name="P88">Introdução ao for / in - Estrutura de repetição para coisas finitas</text:p>
      <text:p text:style-name="P89"/>
      <text:p text:style-name="P90">O for é utilizado para fazer códigos de repetição que é possível saber quantas vezes </text:p>
      <text:p text:style-name="P90">ele vai ser executado, essa estrutura de repetição tem limites definidos, diferente do while, </text:p>
      <text:p text:style-name="P90">que enquanto não colocar o comando de parada, ele continua executando.</text:p>
      <text:p text:style-name="P91"/>
      <text:p text:style-name="P90">O código abaixo mostra a iteração de strings utilizando for:</text:p>
      <text:p text:style-name="P90">"""</text:p>
      <text:p text:style-name="P91"/>
      <text:p text:style-name="P90">texto = "Python"</text:p>
      <text:p text:style-name="P91"/>
      <text:p text:style-name="P90">texto_novo = ""</text:p>
      <text:p text:style-name="P90">for letra in texto:</text:p>
      <text:p text:style-name="P92">    <text:span text:style-name="T32">texto_novo += f"*{letra}"</text:span></text:p>
      <text:p text:style-name="P92">    <text:span text:style-name="T32">print(letra)</text:span></text:p>
      <text:p text:style-name="P90">print(texto_novo + "*")</text:p>
      <text:p text:style-name="P91"/>
      <text:p text:style-name="P90">"""</text:p>
      <text:p text:style-name="P90">Resultado:</text:p>
      <text:p text:style-name="P91"/>
      <text:p text:style-name="P90">P</text:p>
      <text:p text:style-name="P90">y</text:p>
      <text:p text:style-name="P90">t</text:p>
      <text:p text:style-name="P90"><text:soft-page-break/>h</text:p>
      <text:p text:style-name="P90">o</text:p>
      <text:p text:style-name="P90">n</text:p>
      <text:p text:style-name="P90">*P*y*t*h*o*n*</text:p>
      <text:p text:style-name="P93"/>
      <text:p text:style-name="P94">Range + For para usar intervalos de números</text:p>
      <text:p text:style-name="P91"/>
      <text:p text:style-name="P90">Estrutura da função range, mostrando os parâmetros que ele recebe:</text:p>
      <text:p text:style-name="P91"/>
      <text:p text:style-name="P90">range(start, stop, step)</text:p>
      <text:p text:style-name="P91"/>
      <text:p text:style-name="P90">o Step é para propor de quantos em quantos números deseja pular.</text:p>
      <text:p text:style-name="P91"/>
      <text:p text:style-name="P90">mas ele pode receber apenas um parâmetro, por exemplo o parâmetro de stop, que vai definir</text:p>
      <text:p text:style-name="P90">a parada, e o start vira 0 e o step vira 1, veja o código abaixo: </text:p>
      <text:p text:style-name="P91"/>
      <text:p text:style-name="P90">for n in range(10):</text:p>
      <text:p text:style-name="P92">    <text:span text:style-name="T32">print(n)</text:span></text:p>
      <text:p text:style-name="P95"/>
      <text:p text:style-name="P90">Resultado:</text:p>
      <text:p text:style-name="P91"/>
      <text:p text:style-name="P90">0</text:p>
      <text:p text:style-name="P90">1</text:p>
      <text:p text:style-name="P90">2</text:p>
      <text:p text:style-name="P90">3</text:p>
      <text:p text:style-name="P90">4</text:p>
      <text:p text:style-name="P90">5</text:p>
      <text:p text:style-name="P90">6</text:p>
      <text:p text:style-name="P90">7</text:p>
      <text:p text:style-name="P90">8</text:p>
      <text:p text:style-name="P90">9</text:p>
      <text:p text:style-name="P91"/>
      <text:p text:style-name="P90">for n in range(0, 10, 1):</text:p>
      <text:p text:style-name="P92">    <text:span text:style-name="T32">print(n)</text:span></text:p>
      <text:p text:style-name="P95"/>
      <text:p text:style-name="P90">Range utilizando os três parâmetro vai agir do mesmo jeito que </text:p>
      <text:p text:style-name="P90">o primeiro exemplo.</text:p>
      <text:p text:style-name="P90"/>
      <text:p text:style-name="P90">Resultado:</text:p>
      <text:p text:style-name="P91"/>
      <text:p text:style-name="P90">0</text:p>
      <text:p text:style-name="P90">1</text:p>
      <text:p text:style-name="P90">2</text:p>
      <text:p text:style-name="P90">3</text:p>
      <text:p text:style-name="P90">4</text:p>
      <text:p text:style-name="P90">5</text:p>
      <text:p text:style-name="P90">6</text:p>
      <text:p text:style-name="P90">7</text:p>
      <text:p text:style-name="P90">8</text:p>
      <text:p text:style-name="P90">9</text:p>
      <text:p text:style-name="P90"><text:soft-page-break/></text:p>
      <text:p text:style-name="P90">for n in range(0, -10, -1):</text:p>
      <text:p text:style-name="P92">    <text:span text:style-name="T32">print(n)</text:span></text:p>
      <text:p text:style-name="P90"/>
      <text:p text:style-name="P90">utilizando range para contar números de traz para frente</text:p>
      <text:p text:style-name="P91"/>
      <text:p text:style-name="P90">Resultado:</text:p>
      <text:p text:style-name="P91"/>
      <text:p text:style-name="P90">0</text:p>
      <text:p text:style-name="P90">-1</text:p>
      <text:p text:style-name="P90">-2</text:p>
      <text:p text:style-name="P90">-3</text:p>
      <text:p text:style-name="P90">-4</text:p>
      <text:p text:style-name="P90">-5</text:p>
      <text:p text:style-name="P90">-6</text:p>
      <text:p text:style-name="P90">-7</text:p>
      <text:p text:style-name="P90">-8</text:p>
      <text:p text:style-name="P90">-9</text:p>
      <text:p text:style-name="P90"/>
      <text:p text:style-name="P90">for n in range(0, 10, 2):</text:p>
      <text:p text:style-name="P92">    <text:span text:style-name="T32">print(n)</text:span></text:p>
      <text:p text:style-name="P95"/>
      <text:p text:style-name="P90">range iterando a contagem de 2 em 2 com o step.</text:p>
      <text:p text:style-name="P90">resultado:</text:p>
      <text:p text:style-name="P91"/>
      <text:p text:style-name="P90">0</text:p>
      <text:p text:style-name="P90">2</text:p>
      <text:p text:style-name="P90">4</text:p>
      <text:p text:style-name="P90">6</text:p>
      <text:p text:style-name="P90">8</text:p>
      <text:p text:style-name="P90"/>
      <text:p text:style-name="P94">Como o for funciona por debaixo dos panos: </text:p>
      <text:p text:style-name="P90"/>
      <text:p text:style-name="P90">(next, iter, iterável, iterador)</text:p>
      <text:p text:style-name="P91"/>
      <text:p text:style-name="P90">next - me entregue o proxímo valor</text:p>
      <text:p text:style-name="P90">iter - me entregue o seu iterador</text:p>
      <text:p text:style-name="P90">iterável - str, range, etc...</text:p>
      <text:p text:style-name="P90">iterador - quem sabe entregar um valor por vez</text:p>
      <text:p text:style-name="P90"/>
      <text:p text:style-name="P90">texto = iter("David") #.__iter__() função iter() faz a mesma coisa que o método __iter__()</text:p>
      <text:p text:style-name="P90"># aqui ele vai guardar os iteráveis que são as strings, mas ele vai mostrar somente o endereço</text:p>
      <text:p text:style-name="P90"># do objeto.</text:p>
      <text:p text:style-name="P90">print(texto)</text:p>
      <text:p text:style-name="P90"/>
      <text:p text:style-name="P90">resultado:</text:p>
      <text:p text:style-name="P91"/>
      <text:p text:style-name="P90">&lt;str_ascii_iterator object at 0x785d979e26b0&gt;</text:p>
      <text:p text:style-name="P90"/>
      <text:p text:style-name="P90"># Para mostrar a iteração item por item é necessário chamar o método ou função next.</text:p>
      <text:p text:style-name="P91"><text:soft-page-break/></text:p>
      <text:p text:style-name="P90">print(texto.__next__())</text:p>
      <text:p text:style-name="P90">print(texto.__next__())</text:p>
      <text:p text:style-name="P90">print(texto.__next__())</text:p>
      <text:p text:style-name="P90">print(texto.__next__())</text:p>
      <text:p text:style-name="P90">print(texto.__next__())</text:p>
      <text:p text:style-name="P91"/>
      <text:p text:style-name="P90"># print(texto.__next__()) se chamar esse ultimo print como o nome tem 5 letras ela vai iterar 5 vezes,</text:p>
      <text:p text:style-name="P90"># se chamar novamente e não existir nada a mostrar vai gerar o erro StopIteration.</text:p>
      <text:p text:style-name="P91"/>
      <text:p text:style-name="P90"># E pode ser usado a função do next também:</text:p>
      <text:p text:style-name="P90">texto = iter("David")</text:p>
      <text:p text:style-name="P91"/>
      <text:p text:style-name="P90">print(next(texto))</text:p>
      <text:p text:style-name="P90">print(next(texto))</text:p>
      <text:p text:style-name="P90">print(next(texto))</text:p>
      <text:p text:style-name="P90">print(next(texto))</text:p>
      <text:p text:style-name="P90">print(next(texto))</text:p>
      <text:p text:style-name="P95"/>
      <text:p text:style-name="P90">resltado de ambos:</text:p>
      <text:p text:style-name="P91"/>
      <text:p text:style-name="P90">D</text:p>
      <text:p text:style-name="P90">a</text:p>
      <text:p text:style-name="P90">v</text:p>
      <text:p text:style-name="P90">i</text:p>
      <text:p text:style-name="P90">d</text:p>
      <text:p text:style-name="P95"/>
      <text:p text:style-name="P90">texto = "Luiz" # Iterável</text:p>
      <text:p text:style-name="P90">iterador = iter(texto) # Iterator</text:p>
      <text:p text:style-name="P91"/>
      <text:p text:style-name="P90"># Por debaixo dos panos praticamente é isso que o for faz:</text:p>
      <text:p text:style-name="P90">while True:</text:p>
      <text:p text:style-name="P92">    <text:span text:style-name="T32">try:</text:span></text:p>
      <text:p text:style-name="P92">        <text:span text:style-name="T32">letra = next(iterador)</text:span></text:p>
      <text:p text:style-name="P92">        <text:span text:style-name="T32">print(letra)</text:span></text:p>
      <text:p text:style-name="P92">    <text:span text:style-name="T32">except StopIteration:</text:span></text:p>
      <text:p text:style-name="P92">        <text:span text:style-name="T32">break</text:span></text:p>
      <text:p text:style-name="P90"/>
      <text:p text:style-name="P90">resposta:</text:p>
      <text:p text:style-name="P91"/>
      <text:p text:style-name="P90">L</text:p>
      <text:p text:style-name="P90">u</text:p>
      <text:p text:style-name="P90">i</text:p>
      <text:p text:style-name="P90">z</text:p>
      <text:p text:style-name="P95"/>
      <text:p text:style-name="P90"># Fazendo o for o procedimento fica simples:</text:p>
      <text:p text:style-name="P91"/>
      <text:p text:style-name="P90">for letra in texto:</text:p>
      <text:p text:style-name="P92">    <text:span text:style-name="T32">print(letra)</text:span></text:p>
      <text:p text:style-name="P90"/>
      <text:p text:style-name="P90"><text:soft-page-break/>Resultado:</text:p>
      <text:p text:style-name="P91"/>
      <text:p text:style-name="P90">L</text:p>
      <text:p text:style-name="P90">u</text:p>
      <text:p text:style-name="P90">i</text:p>
      <text:p text:style-name="P90">z</text:p>
      <text:p text:style-name="P95"/>
      <text:p text:style-name="P96"><text:span text:style-name="T34">O que aprendemos com o while também funciona no for(continue, break, else, etc)</text:span></text:p>
      <text:p text:style-name="P91"/>
      <text:p text:style-name="P90">for i in range(10):</text:p>
      <text:p text:style-name="P92">    <text:span text:style-name="T32">if i == 2:</text:span></text:p>
      <text:p text:style-name="P92">        <text:span text:style-name="T32">print("i é 2, pulando...")</text:span></text:p>
      <text:p text:style-name="P92">        <text:span text:style-name="T32">continue</text:span></text:p>
      <text:p text:style-name="P91"/>
      <text:p text:style-name="P92">    <text:span text:style-name="T32">if i == 8:</text:span></text:p>
      <text:p text:style-name="P92">        <text:span text:style-name="T32">print("i é 8, seu else não executará")</text:span></text:p>
      <text:p text:style-name="P92">        <text:span text:style-name="T32">break</text:span></text:p>
      <text:p text:style-name="P91"/>
      <text:p text:style-name="P92">    <text:span text:style-name="T32">for j in range(1, 3):</text:span></text:p>
      <text:p text:style-name="P92">        <text:span text:style-name="T32">print(i, j)</text:span></text:p>
      <text:p text:style-name="P91"/>
      <text:p text:style-name="P90">else:</text:p>
      <text:p text:style-name="P92">    <text:span text:style-name="T32">print("For completo com sucesso!")</text:span></text:p>
      <text:p text:style-name="P95"/>
      <text:p text:style-name="P90">resultado:</text:p>
      <text:p text:style-name="P91"/>
      <text:p text:style-name="P90">0 1</text:p>
      <text:p text:style-name="P90">0 2</text:p>
      <text:p text:style-name="P90">1 1</text:p>
      <text:p text:style-name="P90">1 2</text:p>
      <text:p text:style-name="P90">i é 2, pulando...</text:p>
      <text:p text:style-name="P90">3 1</text:p>
      <text:p text:style-name="P90">3 2</text:p>
      <text:p text:style-name="P90">4 1</text:p>
      <text:p text:style-name="P90">4 2</text:p>
      <text:p text:style-name="P90">5 1</text:p>
      <text:p text:style-name="P90">5 2</text:p>
      <text:p text:style-name="P90">6 1</text:p>
      <text:p text:style-name="P90">6 2</text:p>
      <text:p text:style-name="P90">7 1</text:p>
      <text:p text:style-name="P90">7 2</text:p>
      <text:p text:style-name="P90">i é 8, seu else não executará</text:p>
      <text:p text:style-name="P90"/>
      <text:p text:style-name="P97"/>
      <text:p text:style-name="P95"/>
      <text:p text:style-name="P95"/>
      <text:p text:style-name="P90"/>
      <text:p text:style-name="P95"/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9:21:39.643171513</meta:creation-date>
    <dc:date>2026-07-05T00:48:05.545955000</dc:date>
    <meta:editing-duration>PT14H46M23S</meta:editing-duration>
    <meta:editing-cycles>88</meta:editing-cycles>
    <meta:generator>LibreOffice/26.2.4.2$Windows_X86_64 LibreOffice_project/0229ac93fcf0d7cbc6376066c6f35021cef002dc</meta:generator>
    <meta:document-statistic meta:table-count="0" meta:image-count="0" meta:object-count="0" meta:page-count="20" meta:paragraph-count="694" meta:word-count="3251" meta:character-count="18844" meta:non-whitespace-character-count="16020"/>
  </office:meta>
</office:document-meta>
</file>